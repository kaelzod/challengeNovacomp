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73000002E45B210F7E.png" manifest:media-type="image/png"/>
  <manifest:file-entry manifest:full-path="Pictures/10000001000001E80000014BB72E5CD8.png" manifest:media-type="image/png"/>
  <manifest:file-entry manifest:full-path="Pictures/100000010000025600000144790C56B2.png" manifest:media-type="image/png"/>
  <manifest:file-entry manifest:full-path="Pictures/10000001000001F300000101C2750D44.png" manifest:media-type="image/png"/>
  <manifest:file-entry manifest:full-path="Pictures/100000010000022F00000131F758C60D.png" manifest:media-type="image/png"/>
  <manifest:file-entry manifest:full-path="Pictures/10000001000002950000013228F16378.png" manifest:media-type="image/png"/>
  <manifest:file-entry manifest:full-path="Pictures/10000001000001C1000001245AFFB2C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Droid Sans Mono" svg:font-family="'Droid Sans Mono', monospac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egoe UI" svg:font-family="'Segoe UI'" style:font-family-generic="roman"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等线" svg:font-family="等线" style:font-family-generic="system" style:font-pitch="variable"/>
    <style:font-face style:name="等线 Light" svg:font-family="'等线 Light'"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3.108cm" fo:margin-left="0cm" fo:margin-top="0cm" fo:margin-bottom="0cm" table:align="left" style:writing-mode="page"/>
    </style:style>
    <style:style style:name="Table1.A" style:family="table-column">
      <style:table-column-properties style:column-width="3.108cm"/>
    </style:style>
    <style:style style:name="Table1.1" style:family="table-row">
      <style:table-row-properties fo:keep-together="auto"/>
    </style:style>
    <style:style style:name="Table1.A1" style:family="table-cell">
      <style:table-cell-properties style:vertical-align="middle" fo:padding="0.026cm" fo:border="none"/>
    </style:style>
    <style:style style:name="Table2" style:family="table">
      <style:table-properties style:width="8.29cm" table:align="left" style:writing-mode="lr-tb"/>
    </style:style>
    <style:style style:name="Table2.A" style:family="table-column">
      <style:table-column-properties style:column-width="2.293cm"/>
    </style:style>
    <style:style style:name="Table2.B" style:family="table-column">
      <style:table-column-properties style:column-width="1.588cm"/>
    </style:style>
    <style:style style:name="Table2.C" style:family="table-column">
      <style:table-column-properties style:column-width="4.41cm"/>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3" style:family="table">
      <style:table-properties style:width="15.24cm" fo:margin-top="0cm" fo:margin-bottom="0cm" table:align="center" style:writing-mode="lr-tb"/>
    </style:style>
    <style:style style:name="Table3.A" style:family="table-column">
      <style:table-column-properties style:column-width="3.81cm"/>
    </style:style>
    <style:style style:name="Table3.D" style:family="table-column">
      <style:table-column-properties style:column-width="3.808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6.51cm" table:align="margins" style:writing-mode="lr-tb"/>
    </style:style>
    <style:style style:name="Table4.A" style:family="table-column">
      <style:table-column-properties style:column-width="8.255cm" style:rel-column-width="32767*"/>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4.4" style:family="table-row">
      <style:table-row-properties style:min-row-height="2.434cm"/>
    </style:style>
    <style:style style:name="P1" style:family="paragraph" style:parent-style-name="Heading_20_1">
      <style:paragraph-properties fo:break-before="page"/>
    </style:style>
    <style:style style:name="P2" style:family="paragraph" style:parent-style-name="List_20_1" style:list-style-name="WWNum1"/>
    <style:style style:name="P3" style:family="paragraph" style:parent-style-name="List_20_1" style:list-style-name="">
      <style:paragraph-properties fo:margin-left="0.635cm" fo:text-indent="0cm" style:auto-text-indent="false"/>
    </style:style>
    <style:style style:name="P4" style:family="paragraph" style:parent-style-name="List_20_1" style:list-style-name="">
      <style:paragraph-properties fo:margin-left="0.635cm" fo:text-indent="-0.635cm" style:auto-text-indent="false"/>
    </style:style>
    <style:style style:name="P5" style:family="paragraph" style:parent-style-name="Numbering_20_1" style:list-style-name="WWNum6"/>
    <style:style style:name="P6" style:family="paragraph" style:parent-style-name="Numbering_20_1" style:list-style-name="WWNum6">
      <style:text-properties officeooo:paragraph-rsid="0004a977"/>
    </style:style>
    <style:style style:name="P7" style:family="paragraph" style:parent-style-name="Numbering_20_1" style:list-style-name="WWNum18"/>
    <style:style style:name="P8" style:family="paragraph" style:parent-style-name="Numbering_20_1" style:list-style-name=""/>
    <style:style style:name="P9" style:family="paragraph" style:parent-style-name="Numbering_20_1" style:list-style-name="">
      <style:text-properties officeooo:paragraph-rsid="0004a977"/>
    </style:style>
    <style:style style:name="P10" style:family="paragraph" style:parent-style-name="Numbering_20_1" style:list-style-name="">
      <style:text-properties fo:background-color="#ffff00"/>
    </style:style>
    <style:style style:name="P11" style:family="paragraph" style:parent-style-name="Numbering_20_1" style:list-style-name="">
      <style:text-properties officeooo:rsid="0004a977" officeooo:paragraph-rsid="0004a977" fo:background-color="#ffff00"/>
    </style:style>
    <style:style style:name="P12" style:family="paragraph" style:parent-style-name="Standard">
      <style:text-properties fo:language="es" fo:country="PE"/>
    </style:style>
    <style:style style:name="P13" style:family="paragraph" style:parent-style-name="Standard">
      <style:text-properties fo:language="es" fo:country="PE" fo:font-style="italic" fo:font-weight="bold" officeooo:rsid="0002fa64" officeooo:paragraph-rsid="0002fa64" style:font-style-asian="italic" style:font-weight-asian="bold" style:font-style-complex="italic" style:font-weight-complex="bold"/>
    </style:style>
    <style:style style:name="P14" style:family="paragraph" style:parent-style-name="Standard">
      <style:text-properties fo:language="es" fo:country="PE" fo:font-style="italic" fo:font-weight="bold" officeooo:rsid="0002fa64" officeooo:paragraph-rsid="0002fa64" fo:background-color="#ffff00" style:font-style-asian="italic" style:font-weight-asian="bold" style:font-style-complex="italic" style:font-weight-complex="bold"/>
    </style:style>
    <style:style style:name="P15" style:family="paragraph" style:parent-style-name="Standard">
      <style:paragraph-properties fo:margin-top="0cm" fo:margin-bottom="0.282cm" style:contextual-spacing="false" fo:break-before="page"/>
      <style:text-properties fo:language="es" fo:country="PE" fo:font-weight="bold" style:font-weight-asian="bold" style:font-weight-complex="bold"/>
    </style:style>
    <style:style style:name="P16" style:family="paragraph" style:parent-style-name="Standard">
      <style:text-properties fo:language="es" fo:country="PE" fo:background-color="#ffff00"/>
    </style:style>
    <style:style style:name="P17" style:family="paragraph" style:parent-style-name="Standard">
      <style:text-properties fo:language="es" fo:country="PE" fo:font-weight="normal" fo:background-color="#ffff00" style:font-weight-asian="normal" style:font-weight-complex="normal"/>
    </style:style>
    <style:style style:name="P18" style:family="paragraph" style:parent-style-name="Standard">
      <style:text-properties fo:language="es" fo:country="PE" fo:font-weight="normal" officeooo:paragraph-rsid="00008e95" fo:background-color="#ffff00" style:font-weight-asian="normal" style:font-weight-complex="normal"/>
    </style:style>
    <style:style style:name="P19" style:family="paragraph" style:parent-style-name="Standard">
      <style:paragraph-properties fo:margin-top="0cm" fo:margin-bottom="0.081cm" style:contextual-spacing="false" fo:line-height="100%"/>
      <style:text-properties fo:language="es" fo:country="PE" fo:font-weight="normal" officeooo:paragraph-rsid="00008e95" fo:background-color="#ffff00" style:font-weight-asian="normal" style:font-weight-complex="normal"/>
    </style:style>
    <style:style style:name="P20" style:family="paragraph" style:parent-style-name="Standard" style:list-style-name="WWNum17"/>
    <style:style style:name="P21" style:family="paragraph" style:parent-style-name="Standard">
      <style:text-properties fo:font-size="16pt" fo:language="es" fo:country="PE" fo:font-weight="bold" officeooo:rsid="00025d2e" officeooo:paragraph-rsid="00025d2e" style:font-size-asian="16pt" style:font-weight-asian="bold" style:font-size-complex="16pt" style:font-weight-complex="bold"/>
    </style:style>
    <style:style style:name="P22" style:family="paragraph" style:parent-style-name="Standard">
      <style:text-properties fo:font-size="16pt" fo:language="es" fo:country="PE" fo:font-weight="bold" officeooo:rsid="00025d2e" officeooo:paragraph-rsid="00025d2e" fo:background-color="#ffff00" style:font-size-asian="16pt" style:font-weight-asian="bold" style:font-size-complex="16pt" style:font-weight-complex="bold"/>
    </style:style>
    <style:style style:name="P23" style:family="paragraph" style:parent-style-name="Standard">
      <style:text-properties fo:color="#bbbebf" loext:opacity="100%" style:font-name="Droid Sans Mono" fo:font-size="10.5pt" fo:font-weight="normal" officeooo:rsid="00061cec" officeooo:paragraph-rsid="00061cec" fo:background-color="transparent"/>
    </style:style>
    <style:style style:name="P24" style:family="paragraph" style:parent-style-name="Standard">
      <style:paragraph-properties fo:margin-left="0cm" fo:margin-right="0cm" fo:margin-top="0cm" fo:margin-bottom="0cm" style:contextual-spacing="false" style:line-height-at-least="0.503cm" fo:text-indent="0cm" style:auto-text-indent="false"/>
      <style:text-properties fo:color="#bbbebf" loext:opacity="100%" style:font-name="Droid Sans Mono" fo:font-size="10.5pt" fo:font-weight="normal" fo:background-color="transparent"/>
    </style:style>
    <style:style style:name="P25" style:family="paragraph" style:parent-style-name="Standard">
      <style:text-properties fo:color="#bbbebf" loext:opacity="100%" style:font-name="Droid Sans Mono" fo:font-size="10.5pt" fo:font-weight="normal" fo:background-color="transparent"/>
    </style:style>
    <style:style style:name="P26" style:family="paragraph" style:parent-style-name="Standard">
      <style:text-properties officeooo:paragraph-rsid="00008e95"/>
    </style:style>
    <style:style style:name="P27" style:family="paragraph" style:parent-style-name="Standard">
      <style:paragraph-properties fo:break-before="page"/>
      <style:text-properties officeooo:paragraph-rsid="00008e95"/>
    </style:style>
    <style:style style:name="P28" style:family="paragraph" style:parent-style-name="Standard">
      <style:paragraph-properties fo:break-before="page"/>
    </style:style>
    <style:style style:name="P29" style:family="paragraph" style:parent-style-name="Standard">
      <style:text-properties fo:font-weight="bold" style:font-weight-asian="bold" style:font-weight-complex="bold"/>
    </style:style>
    <style:style style:name="P30" style:family="paragraph" style:parent-style-name="Standard">
      <style:text-properties fo:font-weight="bold" officeooo:paragraph-rsid="0008db36" style:font-weight-asian="bold" style:font-weight-complex="bold"/>
    </style:style>
    <style:style style:name="P31" style:family="paragraph" style:parent-style-name="Standard">
      <style:text-properties officeooo:rsid="00025d2e" officeooo:paragraph-rsid="00025d2e" fo:background-color="#ffff00"/>
    </style:style>
    <style:style style:name="P32" style:family="paragraph" style:parent-style-name="Standard">
      <style:text-properties fo:background-color="#ffff00"/>
    </style:style>
    <style:style style:name="P33" style:family="paragraph" style:parent-style-name="Standard">
      <style:text-properties officeooo:paragraph-rsid="0006de23" fo:background-color="#ffff00"/>
    </style:style>
    <style:style style:name="P34" style:family="paragraph" style:parent-style-name="Standard" style:list-style-name="L1">
      <style:text-properties officeooo:paragraph-rsid="0006de23" fo:background-color="#ffff00"/>
    </style:style>
    <style:style style:name="P35" style:family="paragraph" style:parent-style-name="Standard">
      <style:text-properties officeooo:rsid="0006de23" officeooo:paragraph-rsid="0006de23" fo:background-color="#ffff00"/>
    </style:style>
    <style:style style:name="P36" style:family="paragraph" style:parent-style-name="Standard">
      <style:text-properties officeooo:rsid="0008db36" officeooo:paragraph-rsid="0008db36" fo:background-color="#ffff00"/>
    </style:style>
    <style:style style:name="P37" style:family="paragraph" style:parent-style-name="Standard">
      <style:text-properties officeooo:rsid="00061cec" officeooo:paragraph-rsid="00061cec"/>
    </style:style>
    <style:style style:name="P38" style:family="paragraph" style:parent-style-name="Standard">
      <style:paragraph-properties fo:margin-left="0cm" fo:margin-right="0cm" fo:margin-top="0cm" fo:margin-bottom="0cm" style:contextual-spacing="false" style:line-height-at-least="0.503cm" fo:text-indent="0cm" style:auto-text-indent="false"/>
      <style:text-properties fo:color="#8b949e" loext:opacity="100%" style:font-name="Droid Sans Mono" fo:font-size="10.5pt" fo:font-weight="normal" fo:background-color="transparent"/>
    </style:style>
    <style:style style:name="P39" style:family="paragraph" style:parent-style-name="Standard">
      <style:paragraph-properties fo:margin-top="0cm" fo:margin-bottom="0cm" style:contextual-spacing="false" style:line-height-at-least="0.503cm"/>
      <style:text-properties fo:background-color="transparent"/>
    </style:style>
    <style:style style:name="P40" style:family="paragraph" style:parent-style-name="Standard">
      <style:text-properties officeooo:paragraph-rsid="0006de23"/>
    </style:style>
    <style:style style:name="P41" style:family="paragraph" style:parent-style-name="Standard">
      <style:text-properties officeooo:rsid="0006de23" officeooo:paragraph-rsid="0006de23"/>
    </style:style>
    <style:style style:name="P42" style:family="paragraph" style:parent-style-name="Standard">
      <style:paragraph-properties fo:margin-top="0cm" fo:margin-bottom="0cm" style:contextual-spacing="false" fo:line-height="100%" fo:text-align="center" style:justify-single-word="false" fo:orphans="2" fo:widows="2"/>
      <style:text-properties style:font-name="Cambria" fo:font-size="11pt" fo:language="en" fo:country="US" officeooo:paragraph-rsid="0006de23" style:letter-kerning="false" style:font-name-asian="ＭＳ 明朝" style:font-size-asian="11pt" style:language-asian="en" style:country-asian="US" style:font-name-complex="F" style:font-size-complex="11pt" style:language-complex="ar" style:country-complex="SA"/>
    </style:style>
    <style:style style:name="P43" style:family="paragraph" style:parent-style-name="Standard">
      <style:paragraph-properties fo:margin-top="0cm" fo:margin-bottom="0cm" style:contextual-spacing="false" fo:line-height="100%" fo:text-align="start" style:justify-single-word="false" fo:orphans="2" fo:widows="2"/>
      <style:text-properties style:font-name="Cambria" fo:font-size="11pt" fo:language="en" fo:country="US" officeooo:paragraph-rsid="0006de23" style:letter-kerning="false" style:font-name-asian="ＭＳ 明朝" style:font-size-asian="11pt" style:language-asian="en" style:country-asian="US" style:font-name-complex="F" style:font-size-complex="11pt" style:language-complex="ar" style:country-complex="SA"/>
    </style:style>
    <style:style style:name="P44" style:family="paragraph" style:parent-style-name="Standard">
      <style:text-properties officeooo:rsid="0008db36" officeooo:paragraph-rsid="0008db36"/>
    </style:style>
    <style:style style:name="P45" style:family="paragraph" style:parent-style-name="Standard">
      <style:text-properties officeooo:paragraph-rsid="0008db36"/>
    </style:style>
    <style:style style:name="P46" style:family="paragraph" style:parent-style-name="Standard" style:list-style-name="L2">
      <style:text-properties officeooo:paragraph-rsid="0008db36"/>
    </style:style>
    <style:style style:name="P47" style:family="paragraph" style:parent-style-name="Subtitle">
      <style:paragraph-properties fo:text-align="center" style:justify-single-word="false"/>
    </style:style>
    <style:style style:name="P48" style:family="paragraph" style:parent-style-name="Table_20_Contents">
      <style:text-properties fo:font-size="8pt" officeooo:rsid="00025d2e" officeooo:paragraph-rsid="00025d2e" style:font-size-asian="8pt" style:font-size-complex="8pt"/>
    </style:style>
    <style:style style:name="P49" style:family="paragraph" style:parent-style-name="Table_20_Contents">
      <style:text-properties fo:font-size="8pt" fo:font-weight="bold" officeooo:rsid="00025d2e" officeooo:paragraph-rsid="00025d2e" style:font-size-asian="8pt" style:font-weight-asian="bold" style:font-size-complex="8pt" style:font-weight-complex="bold"/>
    </style:style>
    <style:style style:name="P50" style:family="paragraph" style:parent-style-name="Table_20_Contents">
      <style:paragraph-properties fo:text-align="center" style:justify-single-word="false"/>
      <style:text-properties fo:font-weight="bold" officeooo:rsid="00093c14" officeooo:paragraph-rsid="00093c14" fo:background-color="transparent" style:font-weight-asian="bold" style:font-weight-complex="bold"/>
    </style:style>
    <style:style style:name="P51" style:family="paragraph" style:parent-style-name="Title">
      <style:paragraph-properties fo:text-align="center" style:justify-single-word="false"/>
    </style:style>
    <style:style style:name="T1" style:family="text">
      <style:text-properties fo:language="es" fo:country="PE"/>
    </style:style>
    <style:style style:name="T2" style:family="text">
      <style:text-properties fo:language="es" fo:country="PE" fo:font-weight="bold" style:font-weight-asian="bold" style:font-weight-complex="bold"/>
    </style:style>
    <style:style style:name="T3" style:family="text">
      <style:text-properties fo:language="es" fo:country="PE" fo:font-weight="bold" officeooo:rsid="00008e95" style:font-weight-asian="bold" style:font-weight-complex="bold"/>
    </style:style>
    <style:style style:name="T4" style:family="text">
      <style:text-properties fo:language="es" fo:country="PE" fo:font-style="italic" style:font-style-asian="italic" style:font-style-complex="italic"/>
    </style:style>
    <style:style style:name="T5" style:family="text">
      <style:text-properties fo:language="es" fo:country="PE" fo:font-style="italic" fo:font-weight="bold" style:font-style-asian="italic" style:font-weight-asian="bold" style:font-style-complex="italic" style:font-weight-complex="bold"/>
    </style:style>
    <style:style style:name="T6" style:family="text">
      <style:text-properties fo:font-size="16pt" fo:language="es" fo:country="PE" fo:font-weight="bold" style:font-size-asian="16pt" style:font-weight-asian="bold" style:font-size-complex="16pt" style:font-weight-complex="bold"/>
    </style:style>
    <style:style style:name="T7" style:family="text">
      <style:text-properties style:font-name="Segoe UI Symbol" fo:language="es" fo:country="PE" style:font-name-complex="Segoe UI Symbol1"/>
    </style:style>
    <style:style style:name="T8" style:family="text">
      <style:text-properties style:font-name="Segoe UI Symbol" fo:language="es" fo:country="PE" fo:font-weight="bold" style:font-weight-asian="bold" style:font-name-complex="Segoe UI Symbol1" style:font-weight-complex="bold"/>
    </style:style>
    <style:style style:name="T9" style:family="text">
      <style:text-properties style:font-name="Segoe UI Symbol" fo:font-size="14pt" fo:language="es" fo:country="PE" fo:font-weight="bold" style:font-size-asian="14pt" style:font-weight-asian="bold" style:font-name-complex="Segoe UI Symbol1" style:font-size-complex="14pt" style:font-weight-complex="bold"/>
    </style:style>
    <style:style style:name="T10" style:family="text">
      <style:text-properties fo:font-size="14pt" fo:language="es" fo:country="PE" fo:font-weight="bold" style:font-size-asian="14pt" style:font-weight-asian="bold" style:font-size-complex="14pt" style:font-weight-complex="bold"/>
    </style:style>
    <style:style style:name="T11" style:family="text">
      <style:text-properties fo:font-size="11pt" fo:language="es" fo:country="PE" style:font-size-asian="11pt" style:font-size-complex="11pt"/>
    </style:style>
    <style:style style:name="T12" style:family="text">
      <style:text-properties fo:font-size="11pt" style:font-size-asian="11pt" style:font-size-complex="11pt"/>
    </style:style>
    <style:style style:name="T13" style:family="text">
      <style:text-properties fo:font-size="11pt" officeooo:rsid="0006de23" style:font-size-asian="11pt" style:font-size-complex="11pt"/>
    </style:style>
    <style:style style:name="T14" style:family="text">
      <style:text-properties fo:font-weight="bold" style:font-weight-asian="bold" style:font-weight-complex="bold"/>
    </style:style>
    <style:style style:name="T15" style:family="text">
      <style:text-properties officeooo:rsid="00025d2e"/>
    </style:style>
    <style:style style:name="T16" style:family="text">
      <style:text-properties officeooo:rsid="0004a977" fo:background-color="#ffff00" loext:char-shading-value="0"/>
    </style:style>
    <style:style style:name="T17" style:family="text">
      <style:text-properties fo:color="#c586c0" loext:opacity="100%"/>
    </style:style>
    <style:style style:name="T18" style:family="text">
      <style:text-properties fo:color="#c586c0" loext:opacity="100%" fo:font-size="11pt" style:font-size-asian="11pt" style:font-size-complex="11pt"/>
    </style:style>
    <style:style style:name="T19" style:family="text">
      <style:text-properties fo:color="#bbbebf" loext:opacity="100%" style:font-name="Droid Sans Mono" fo:font-size="10.5pt" fo:font-weight="normal"/>
    </style:style>
    <style:style style:name="T20" style:family="text">
      <style:text-properties fo:color="#bbbebf" loext:opacity="100%" style:font-name="Droid Sans Mono" fo:font-size="10.5pt" fo:font-weight="normal" fo:background-color="#121314" loext:char-shading-value="0"/>
    </style:style>
    <style:style style:name="T21" style:family="text">
      <style:text-properties fo:color="#4ec9b0" loext:opacity="100%"/>
    </style:style>
    <style:style style:name="T22" style:family="text">
      <style:text-properties fo:color="#4ec9b0" loext:opacity="100%" fo:font-size="11pt" style:font-size-asian="11pt" style:font-size-complex="11pt"/>
    </style:style>
    <style:style style:name="T23" style:family="text">
      <style:text-properties fo:color="#c9d1d9" loext:opacity="100%"/>
    </style:style>
    <style:style style:name="T24" style:family="text">
      <style:text-properties fo:color="#d4d4d4" loext:opacity="100%"/>
    </style:style>
    <style:style style:name="T25" style:family="text">
      <style:text-properties fo:color="#d2a8ff" loext:opacity="100%"/>
    </style:style>
    <style:style style:name="T26" style:family="text">
      <style:text-properties fo:color="#a5d6ff" loext:opacity="100%"/>
    </style:style>
    <style:style style:name="T27" style:family="text">
      <style:text-properties fo:color="#b5cea8" loext:opacity="100%"/>
    </style:style>
    <style:style style:name="T28" style:family="text">
      <style:text-properties fo:color="#ffa657" loext:opacity="100%"/>
    </style:style>
    <style:style style:name="T29" style:family="text">
      <style:text-properties fo:color="#dcdcaa" loext:opacity="100%"/>
    </style:style>
    <style:style style:name="T30" style:family="text">
      <style:text-properties fo:color="#8b949e" loext:opacity="100%"/>
    </style:style>
    <style:style style:name="T31" style:family="text">
      <style:text-properties fo:color="#569cd6" loext:opacity="100%"/>
    </style:style>
    <style:style style:name="T32" style:family="text">
      <style:text-properties fo:color="#ff7b72" loext:opacity="100%"/>
    </style:style>
    <style:style style:name="T33" style:family="text">
      <style:text-properties fo:color="#79c0ff" loext:opacity="100%"/>
    </style:style>
    <style:style style:name="T34" style:family="text">
      <style:text-properties fo:font-size="9pt" fo:font-weight="bold" style:font-size-asian="9pt" style:font-weight-asian="bold"/>
    </style:style>
    <style:style style:name="T35" style:family="text">
      <style:text-properties fo:font-size="8.5pt" style:font-size-asian="8.5pt"/>
    </style:style>
    <style:style style:name="T36" style:family="text">
      <style:text-properties officeooo:rsid="0008db3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51">EXAMEN TÉCNICO – DATA ENGINEER SEMI SENIOR</text:p>
      <text:p text:style-name="P47">Evaluación técnica – BigQuery / SQL / Integración de datos</text:p>
      <text:p text:style-name="Standard" loext:marker-style-name="T1"><text:span text:style-name="T1">El reto es obtener un puntaje o nivel de conocimiento del Ingeniero de Datos, a través de la solución que brinda a las preguntas planteadas, en las siguientes categorías:</text:span><text:span text:style-name="T1"/></text:p>
      <text:p text:style-name="Standard" loext:marker-style-name="T1"><text:span text:style-name="T1"> </text:span><text:span text:style-name="T1"/></text:p>
      <table:table table:name="Table1" table:style-name="Table1">
        <table:table-column table:style-name="Table1.A"/>
        <table:table-row table:style-name="Table1.1">
          <table:table-cell table:style-name="Table1.A1" office:value-type="string">
            <text:p text:style-name="Standard" loext:marker-style-name="T1"><text:span text:style-name="T2">Categoría</text:span><text:span text:style-name="T2"/></text:p>
          </table:table-cell>
        </table:table-row>
        <table:table-row table:style-name="Table1.1">
          <table:table-cell table:style-name="Table1.A1" office:value-type="string">
            <text:p text:style-name="Standard" loext:marker-style-name="T1"><text:span text:style-name="T1">SQL</text:span><text:span text:style-name="T1"/></text:p>
          </table:table-cell>
        </table:table-row>
        <table:table-row table:style-name="Table1.1">
          <table:table-cell table:style-name="Table1.A1" office:value-type="string">
            <text:p text:style-name="Standard" loext:marker-style-name="T1"><text:span text:style-name="T1">Modelado</text:span><text:span text:style-name="T1"/></text:p>
          </table:table-cell>
        </table:table-row>
        <table:table-row table:style-name="Table1.1">
          <table:table-cell table:style-name="Table1.A1" office:value-type="string">
            <text:p text:style-name="Standard" loext:marker-style-name="T1"><text:span text:style-name="T1">Escalabilidad</text:span><text:span text:style-name="T1"/></text:p>
          </table:table-cell>
        </table:table-row>
        <table:table-row table:style-name="Table1.1">
          <table:table-cell table:style-name="Table1.A1" office:value-type="string">
            <text:p text:style-name="Standard" loext:marker-style-name="T1"><text:span text:style-name="T1">Integración</text:span><text:span text:style-name="T1"/></text:p>
          </table:table-cell>
        </table:table-row>
        <table:table-row table:style-name="Table1.1">
          <table:table-cell table:style-name="Table1.A1" office:value-type="string">
            <text:p text:style-name="Standard" loext:marker-style-name="T1"><text:span text:style-name="T1">Python</text:span><text:span text:style-name="T1"/></text:p>
          </table:table-cell>
        </table:table-row>
        <table:table-row table:style-name="Table1.1">
          <table:table-cell table:style-name="Table1.A1" office:value-type="string">
            <text:p text:style-name="Standard" loext:marker-style-name="T1"><text:span text:style-name="T1">Arquitectura</text:span><text:span text:style-name="T1"/></text:p>
          </table:table-cell>
        </table:table-row>
        <table:table-row table:style-name="Table1.1">
          <table:table-cell table:style-name="Table1.A1" office:value-type="string">
            <text:p text:style-name="Standard" loext:marker-style-name="T1"><text:span text:style-name="T1">Documentación</text:span><text:span text:style-name="T1"/></text:p>
          </table:table-cell>
        </table:table-row>
      </table:table>
      <text:p text:style-name="Standard" loext:marker-style-name="T1"><text:span text:style-name="T1">Debe ser entregado en un documento word o PDF:</text:span><text:span text:style-name="T1"/></text:p>
      <text:p text:style-name="Standard" loext:marker-style-name="T1"><text:span text:style-name="T1"> </text:span><text:span text:style-name="T1"/></text:p>
      <text:p text:style-name="Standard" loext:marker-style-name="T1"><text:span text:style-name="T1">1. Nombres Apellidos: </text:span><text:span text:style-name="T3">César De Azambuja</text:span></text:p>
      <text:p text:style-name="Standard" loext:marker-style-name="T1"><text:span text:style-name="T1">2. Fecha: </text:span><text:span text:style-name="T3">17/06/2026</text:span></text:p>
      <text:p text:style-name="Standard" loext:marker-style-name="T1"><text:span text:style-name="T1">3. El documento debe tener las respuestas a las preguntas, argumentando el por qué de la acción ejecutada, se valora si plantea opciones de solución, enfocándose en alguna alternativa, acompañando el script con el desarrollo (ya sea SQL o </text:span><text:soft-page-break/><text:span text:style-name="T1">Python según el caso), captura de imágenes de los diagramas, conclusión y Recomendación.</text:span><text:span text:style-name="T1"/></text:p>
      <text:p text:style-name="P12" loext:marker-style-name="T1"/>
      <text:h text:style-name="Heading_20_1" text:outline-level="1">Instrucciones generales</text:h>
      <text:p text:style-name="Standard">Lee atentamente todas las instrucciones antes de comenzar.</text:p>
      <text:list xml:id="list2454408268" text:style-name="WWNum6">
        <text:list-item>
          <text:p text:style-name="P5">Cargar todas las tablas CSV proporcionadas en un dataset de BigQuery.</text:p>
        </text:list-item>
        <text:list-item>
          <text:p text:style-name="P5">Usar SQL estándar de BigQuery para resolver los ejercicios.</text:p>
        </text:list-item>
        <text:list-item>
          <text:p text:style-name="P5">Desarrollar las consultas solicitadas de forma clara y ordenada.</text:p>
        </text:list-item>
        <text:list-item>
          <text:p text:style-name="P5">La solución debe ser entendible y mantenible.</text:p>
        </text:list-item>
        <text:list-item>
          <text:p text:style-name="P5">Puedes usar IA generativa (Copilot, ChatGPT, etc.), pero debes entender y explicar tu solución.</text:p>
        </text:list-item>
      </text:list>
      <text:h text:style-name="Heading_20_1" text:outline-level="1">Tablas proporcionadas</text:h>
      <text:p text:style-name="Standard">Las siguientes tablas serán entregadas en formato CSV:</text:p>
      <text:p text:style-name="Standard">Tablas a usar para Parte 1:</text:p>
      <text:list text:style-name="WWNum1">
        <text:list-item>
          <text:p text:style-name="P2">customers</text:p>
        </text:list-item>
        <text:list-item>
          <text:p text:style-name="P2">cards</text:p>
        </text:list-item>
        <text:list-item>
          <text:p text:style-name="P2">transactions</text:p>
        </text:list-item>
      </text:list>
      <text:p text:style-name="P3"/>
      <text:p text:style-name="P4">Tablas a usar para Parte 2:</text:p>
      <text:p text:style-name="Standard"/>
      <text:list xml:id="list232034340386704" text:continue-numbering="true" text:style-name="WWNum1">
        <text:list-item>
          <text:p text:style-name="P2">cards_processor_a.csv</text:p>
        </text:list-item>
        <text:list-item>
          <text:p text:style-name="P2">cards_processor_b.csv</text:p>
        </text:list-item>
        <text:list-item>
          <text:p text:style-name="P2">equivalence_table_extended.csv</text:p>
        </text:list-item>
        <text:list-item>
          <text:p text:style-name="P2">financial_rules.csv</text:p>
        </text:list-item>
        <text:list-item>
          <text:p text:style-name="P2">customers.csv</text:p>
        </text:list-item>
        <text:list-item>
          <text:p text:style-name="P2">cards.csv</text:p>
        </text:list-item>
        <text:list-item>
          <text:p text:style-name="P2">transactions.csv </text:p>
        </text:list-item>
        <text:list-item>
          <text:p text:style-name="P2">transactions_anomalies.csv</text:p>
        </text:list-item>
        <text:list-item>
          <text:p text:style-name="P2"><text:soft-page-break/>business_rules_text.csv</text:p>
        </text:list-item>
      </text:list>
      <text:p text:style-name="P3"/>
      <text:h text:style-name="Heading_20_1" text:outline-level="1"><text:s/>Preparación del entorno</text:h>
      <text:p text:style-name="Standard">Crea un dataset en BigQuery con un nombre libre y carga todas las tablas CSV proporcionadas.</text:p>
      <text:h text:style-name="Heading_20_1" text:outline-level="1">Parte 1 </text:h>
      <text:p text:style-name="Standard" loext:marker-style-name="T6"><text:span text:style-name="T6"><text:s/>Ejercicios SQL</text:span><text:span text:style-name="T6"/></text:p>
      <text:p text:style-name="Standard" loext:marker-style-name="T1"><text:span text:style-name="T1">1️</text:span><text:span text:style-name="T7">⃣</text:span><text:span text:style-name="T1"> Cantidad de clientes por segmento</text:span></text:p>
      <text:p text:style-name="Standard" loext:marker-style-name="T1"><text:span text:style-name="T2">Pregunta:</text:span><text:span text:style-name="T1"><text:line-break/>“Obtén el número de clientes agrupado por segment.”</text:span></text:p>
      <text:p text:style-name="P16"><text:span text:style-name="T14">SELECT</text:span> segment, count(customer_id) as total_clientes</text:p>
      <text:p text:style-name="P16"><text:span text:style-name="T14">FROM</text:span> customers</text:p>
      <text:p text:style-name="P16"><text:span text:style-name="T14">GROUP BY </text:span>segment</text:p>
      <text:p text:style-name="P16"><text:span text:style-name="T14">ORDER BY </text:span>segment</text:p>
      <text:p text:style-name="P12"><draw:frame draw:style-name="fr2" draw:name="Image1" text:anchor-type="char" svg:width="11.88cm" svg:height="7.726cm" draw:z-index="1"><draw:image xlink:href="Pictures/10000001000001C1000001245AFFB2C9.png" xlink:type="simple" xlink:show="embed" xlink:actuate="onLoad" draw:mime-type="image/png"/></draw:frame></text:p>
      <text:p text:style-name="P12"/>
      <text:p text:style-name="P26" loext:marker-style-name="T2"><text:span text:style-name="T2"/></text:p>
      <text:p text:style-name="P26" loext:marker-style-name="T2"><text:span text:style-name="T2"/></text:p>
      <text:p text:style-name="P26" loext:marker-style-name="T2"><text:span text:style-name="T2"/></text:p>
      <text:p text:style-name="P26" loext:marker-style-name="T2"><text:span text:style-name="T2"/></text:p>
      <text:p text:style-name="P26" loext:marker-style-name="T2"><text:span text:style-name="T2"/></text:p>
      <text:p text:style-name="P26" loext:marker-style-name="T2"><text:span text:style-name="T2"/></text:p>
      <text:p text:style-name="P26" loext:marker-style-name="T2"><text:span text:style-name="T2"/></text:p>
      <text:p text:style-name="P26" loext:marker-style-name="T2"><text:soft-page-break/><text:span text:style-name="T2">2️</text:span><text:span text:style-name="T8">⃣</text:span><text:span text:style-name="T2"> <text:s/>Transacciones totales por tipo de tarjeta</text:span></text:p>
      <text:p text:style-name="Standard" loext:marker-style-name="T1"><text:span text:style-name="T1">Necesita JOIN entre transactions y cards.</text:span><text:span text:style-name="T1"/></text:p>
      <text:p text:style-name="Standard" loext:marker-style-name="T1"><text:span text:style-name="T2">Pregunta:</text:span><text:span text:style-name="T1"><text:line-break/>“Muestra el total de transacciones y el monto total por tipo de tarjeta (card_type). Ordénalo por monto total descendente.”</text:span></text:p>
      <text:p text:style-name="P18">SELECT CA.CARD_TYPE, COUNT(TR.TX_ID) AS total_transacciones, SUM(TR.AMOUNT) as monto_total</text:p>
      <text:p text:style-name="P18">FROM cards CA</text:p>
      <text:p text:style-name="P17">INNER JOIN transactions TR on ( CA.card_id = TR.card_id )</text:p>
      <text:p text:style-name="P17">GROUP BY CA.CARD_TYPE</text:p>
      <text:p text:style-name="P17">ORDER BY 3 DESC</text:p>
      <text:p text:style-name="P17"><draw:frame draw:style-name="fr1" draw:name="Image2" text:anchor-type="char" svg:width="16.51cm" svg:height="7.643cm" draw:z-index="0"><draw:image xlink:href="Pictures/10000001000002950000013228F16378.png" xlink:type="simple" xlink:show="embed" xlink:actuate="onLoad" draw:mime-type="image/png"/></draw:frame></text:p>
      <text:p text:style-name="Standard" loext:marker-style-name="T1"><text:span text:style-name="T1"/></text:p>
      <text:p text:style-name="Standard" loext:marker-style-name="T2"><text:span text:style-name="T2"/></text:p>
      <text:p text:style-name="P28" loext:marker-style-name="T2"><text:span text:style-name="T2">3️</text:span><text:span text:style-name="T8">⃣</text:span><text:span text:style-name="T2"> Clientes con tarjetas bloqueadas</text:span></text:p>
      <text:p text:style-name="Standard" loext:marker-style-name="T1"><text:span text:style-name="T2">Pregunta:</text:span><text:span text:style-name="T1"><text:line-break/>“Lista los clientes que tienen al menos 1 tarjeta en estado Blocked.”</text:span></text:p>
      <text:p text:style-name="P18">SELECT CU.FULL_NAME, CU.SEGMENT, CA.CARD_TYPE, CA.STATUS</text:p>
      <text:p text:style-name="P18">FROM customers.csv CU</text:p>
      <text:p text:style-name="P18">INNER JOIN cards.csv CA ON ( CU.CUSTOMER_ID = CA.CUSTOMER_ID )</text:p>
      <text:p text:style-name="P18">WHERE CA.STATUS = 'Blocked'</text:p>
      <text:p text:style-name="P18"><draw:frame draw:style-name="fr2" draw:name="Image3" text:anchor-type="char" svg:width="14.79cm" svg:height="8.07cm" draw:z-index="2"><draw:image xlink:href="Pictures/100000010000022F00000131F758C60D.png" xlink:type="simple" xlink:show="embed" xlink:actuate="onLoad" draw:mime-type="image/png"/></draw:frame></text:p>
      <text:p text:style-name="Standard" loext:marker-style-name="T1"><text:span text:style-name="T1"/></text:p>
      <text:p text:style-name="P26" loext:marker-style-name="T2"><text:span text:style-name="T2"/></text:p>
      <text:p text:style-name="P26" loext:marker-style-name="T2"><text:span text:style-name="T2"/></text:p>
      <text:p text:style-name="P26" loext:marker-style-name="T2"><text:span text:style-name="T2"/></text:p>
      <text:p text:style-name="P26" loext:marker-style-name="T2"><text:span text:style-name="T2"/></text:p>
      <text:p text:style-name="P26" loext:marker-style-name="T2"><text:span text:style-name="T2"/></text:p>
      <text:p text:style-name="P26" loext:marker-style-name="T2"><text:span text:style-name="T2"/></text:p>
      <text:p text:style-name="P26" loext:marker-style-name="T2"><text:span text:style-name="T2"/></text:p>
      <text:p text:style-name="P26" loext:marker-style-name="T2"><text:span text:style-name="T2"/></text:p>
      <text:p text:style-name="P27" loext:marker-style-name="T2"><text:span text:style-name="T2">4️</text:span><text:span text:style-name="T8">⃣</text:span><text:span text:style-name="T2"> <text:s/>Monto promedio por cliente</text:span></text:p>
      <text:p text:style-name="Standard" loext:marker-style-name="T1"><text:span text:style-name="T2">Pregunta:</text:span><text:span text:style-name="T1"><text:line-break/>“Calcula el monto promedio transado por cada cliente. Mostrar solo clientes con más de 3 transacciones.”</text:span></text:p>
      <text:p text:style-name="P18">SELECT CU.FULL_NAME, AVG(TR.AMOUNT) AS MONTO_PROMEDIO</text:p>
      <text:p text:style-name="P18">FROM customers CU</text:p>
      <text:p text:style-name="P18">INNER JOIN cards CA ON ( CU.CUSTOMER_ID = CA.CUSTOMER_ID )</text:p>
      <text:p text:style-name="P18">INNER JOIN transactions TR ON ( CA.CARD_ID = TR.CARD_ID )</text:p>
      <text:p text:style-name="P18">GROUP BY CU.FULL_NAME</text:p>
      <text:p text:style-name="P18">HAVING (COUNT(TR.TX_ID)&gt;3)</text:p>
      <text:p text:style-name="Standard" loext:marker-style-name="T1"><draw:frame draw:style-name="fr3" draw:name="Image4" text:anchor-type="char" svg:width="15.822cm" svg:height="8.573cm" draw:z-index="3"><draw:image xlink:href="Pictures/100000010000025600000144790C56B2.png" xlink:type="simple" xlink:show="embed" xlink:actuate="onLoad" draw:mime-type="image/png"/></draw:frame><text:span text:style-name="T1"/></text:p>
      <text:p text:style-name="Standard" loext:marker-style-name="T2"><text:span text:style-name="T2"/></text:p>
      <text:p text:style-name="P28" loext:marker-style-name="T2"><text:span text:style-name="T2">5️</text:span><text:span text:style-name="T8">⃣</text:span><text:span text:style-name="T2"> Identificar transacciones sospechosas</text:span></text:p>
      <text:p text:style-name="Standard" loext:marker-style-name="T1"><text:span text:style-name="T2">Pregunta:</text:span><text:span text:style-name="T1"><text:line-break/>“Devuelve las transacciones cuyo monto está por encima del percentil 90.”</text:span></text:p>
      <text:p text:style-name="P18">SELECT TX_ID, AMOUNT</text:p>
      <text:p text:style-name="P18">FROM transactions</text:p>
      <text:p text:style-name="P18">WHERE AMOUNT &gt; (</text:p>
      <text:p text:style-name="P18">SELECT PERCENTILE_CONT(0.9) WITHIN GROUP (ORDER BY AMOUNT)</text:p>
      <text:p text:style-name="P18">FROM transactions <text:span text:style-name="T15">)</text:span></text:p>
      <text:p text:style-name="P18">ORDER BY AMOUNT DESC</text:p>
      <text:p text:style-name="Standard" loext:marker-style-name="T1"><text:span text:style-name="T1"/></text:p>
      <text:p text:style-name="Standard" loext:marker-style-name="T1"><draw:frame draw:style-name="fr3" draw:name="Image5" text:anchor-type="char" svg:width="12.912cm" svg:height="8.758cm" draw:z-index="4"><draw:image xlink:href="Pictures/10000001000001E80000014BB72E5CD8.png" xlink:type="simple" xlink:show="embed" xlink:actuate="onLoad" draw:mime-type="image/png"/></draw:frame><text:span text:style-name="T1"/></text:p>
      <text:p text:style-name="Standard" loext:marker-style-name="T2"><text:span text:style-name="T2"/></text:p>
      <text:p text:style-name="Standard" loext:marker-style-name="T2"><text:span text:style-name="T2"/></text:p>
      <text:p text:style-name="Standard" loext:marker-style-name="T2"><text:span text:style-name="T2"/></text:p>
      <text:p text:style-name="Standard" loext:marker-style-name="T2"><text:span text:style-name="T2"/></text:p>
      <text:p text:style-name="Standard" loext:marker-style-name="T2"><text:span text:style-name="T2"/></text:p>
      <text:p text:style-name="Standard" loext:marker-style-name="T2"><text:span text:style-name="T2"/></text:p>
      <text:p text:style-name="Standard" loext:marker-style-name="T2"><text:span text:style-name="T2"/></text:p>
      <text:p text:style-name="Standard" loext:marker-style-name="T2"><text:span text:style-name="T2"/></text:p>
      <text:p text:style-name="Standard" loext:marker-style-name="T2"><text:span text:style-name="T2"/></text:p>
      <text:p text:style-name="Standard" loext:marker-style-name="T2"><text:span text:style-name="T2"/></text:p>
      <text:p text:style-name="P28" loext:marker-style-name="T2"><text:span text:style-name="T2">6️</text:span><text:span text:style-name="T8">⃣</text:span><text:span text:style-name="T2"> <text:s/>Validación entre tablas</text:span></text:p>
      <text:p text:style-name="Standard" loext:marker-style-name="T1"><text:span text:style-name="T2">Pregunta:</text:span><text:span text:style-name="T1"><text:line-break/>“¿Existen transacciones asociadas a tarjetas inexistentes? Si sí, muéstralas.”</text:span></text:p>
      <text:p text:style-name="P18">SELECT TX.TX_ID, TX.CARD_ID, TX.AMOUNT</text:p>
      <text:p text:style-name="P18">FROM './archivos/transactions.csv' TX</text:p>
      <text:p text:style-name="P18">LEFT JOIN './archivos/cards.csv' CA ON (TX.CARD_ID = CA.CARD_ID)</text:p>
      <text:p text:style-name="P18">WHERE CA.CARD_ID IS NULL</text:p>
      <text:p text:style-name="P12" loext:marker-style-name="T1"><draw:frame draw:style-name="fr2" draw:name="Image6" text:anchor-type="char" svg:width="13.203cm" svg:height="6.8cm" draw:z-index="5"><draw:image xlink:href="Pictures/10000001000001F300000101C2750D44.png" xlink:type="simple" xlink:show="embed" xlink:actuate="onLoad" draw:mime-type="image/png"/></draw:frame></text:p>
      <text:p text:style-name="Standard" loext:marker-style-name="T6"><text:span text:style-name="T6"/></text:p>
      <text:p text:style-name="Standard" loext:marker-style-name="T6"><text:span text:style-name="T6"/></text:p>
      <text:p text:style-name="Standard" loext:marker-style-name="T6"><text:span text:style-name="T6"/></text:p>
      <text:p text:style-name="Standard" loext:marker-style-name="T6"><text:span text:style-name="T6"/></text:p>
      <text:p text:style-name="Standard" loext:marker-style-name="T6"><text:span text:style-name="T6"/></text:p>
      <text:p text:style-name="Standard" loext:marker-style-name="T6"><text:span text:style-name="T6"/></text:p>
      <text:p text:style-name="Standard" loext:marker-style-name="T6"><text:span text:style-name="T6"/></text:p>
      <text:p text:style-name="Standard" loext:marker-style-name="T6"><text:span text:style-name="T6">Modelado / Diseño (respuesta redactada)</text:span></text:p>
      <text:p text:style-name="Standard" loext:marker-style-name="T10"><text:span text:style-name="T10">7️</text:span><text:span text:style-name="T9">⃣</text:span><text:span text:style-name="T10"> Diseña una tabla “transacciones enriquecidas”</text:span></text:p>
      <text:p text:style-name="Standard" loext:marker-style-name="T11"><text:span text:style-name="T11">Que combine:</text:span><text:span text:style-name="T11"/></text:p>
      <text:list text:style-name="WWNum17">
        <text:list-item>
          <text:p text:style-name="P20" loext:marker-style-name="T11"><text:span text:style-name="T11">cliente</text:span><text:span text:style-name="T11"/></text:p>
        </text:list-item>
        <text:list-item>
          <text:p text:style-name="P20" loext:marker-style-name="T11"><text:span text:style-name="T11">segmento</text:span><text:span text:style-name="T11"/></text:p>
        </text:list-item>
        <text:list-item>
          <text:p text:style-name="P20" loext:marker-style-name="T11"><text:span text:style-name="T11">tarjeta</text:span><text:span text:style-name="T11"/></text:p>
        </text:list-item>
        <text:list-item>
          <text:p text:style-name="P20" loext:marker-style-name="T11"><text:span text:style-name="T11">tipo</text:span><text:span text:style-name="T11"/></text:p>
        </text:list-item>
        <text:list-item>
          <text:p text:style-name="P20" loext:marker-style-name="T11"><text:span text:style-name="T11">monto</text:span><text:span text:style-name="T11"/></text:p>
        </text:list-item>
        <text:list-item>
          <text:p text:style-name="P20" loext:marker-style-name="T11"><text:span text:style-name="T11">fecha</text:span><text:span text:style-name="T11"/></text:p>
        </text:list-item>
      </text:list>
      <text:p text:style-name="Standard" loext:marker-style-name="T11"><text:soft-page-break/><text:span text:style-name="T11">Pregunta:<text:line-break/>“Diseña el esquema (columnas + tipos de datos) de una tabla de ‘transacciones enriquecidas’ para la capa BI.”</text:span></text:p>
      <table:table table:name="Table2" table:style-name="Table2">
        <table:table-column table:style-name="Table2.A"/>
        <table:table-column table:style-name="Table2.B"/>
        <table:table-column table:style-name="Table2.C"/>
        <table:table-row>
          <table:table-cell table:style-name="Table2.A1" office:value-type="string">
            <text:p text:style-name="P49">COLUMNA</text:p>
          </table:table-cell>
          <table:table-cell table:style-name="Table2.A1" office:value-type="string">
            <text:p text:style-name="P49">TIPO</text:p>
          </table:table-cell>
          <table:table-cell table:style-name="Table2.C1" office:value-type="string">
            <text:p text:style-name="P49">DESCRIPCIÓN</text:p>
          </table:table-cell>
        </table:table-row>
        <table:table-row>
          <table:table-cell table:style-name="Table2.A2" office:value-type="string">
            <text:p text:style-name="P48">tx_id</text:p>
          </table:table-cell>
          <table:table-cell table:style-name="Table2.A2" office:value-type="string">
            <text:p text:style-name="P48">INT64</text:p>
          </table:table-cell>
          <table:table-cell table:style-name="Table2.C2" office:value-type="string">
            <text:p text:style-name="P48">PK</text:p>
          </table:table-cell>
        </table:table-row>
        <table:table-row>
          <table:table-cell table:style-name="Table2.A2" office:value-type="string">
            <text:p text:style-name="P48">tx_date</text:p>
          </table:table-cell>
          <table:table-cell table:style-name="Table2.A2" office:value-type="string">
            <text:p text:style-name="P48">DATE</text:p>
          </table:table-cell>
          <table:table-cell table:style-name="Table2.C2" office:value-type="string">
            <text:p text:style-name="P48">Fecha de Transacción</text:p>
          </table:table-cell>
        </table:table-row>
        <table:table-row>
          <table:table-cell table:style-name="Table2.A2" office:value-type="string">
            <text:p text:style-name="P48">customer_id</text:p>
          </table:table-cell>
          <table:table-cell table:style-name="Table2.A2" office:value-type="string">
            <text:p text:style-name="P48">Int64</text:p>
          </table:table-cell>
          <table:table-cell table:style-name="Table2.C2" office:value-type="string">
            <text:p text:style-name="P48">FK customer</text:p>
          </table:table-cell>
        </table:table-row>
        <table:table-row>
          <table:table-cell table:style-name="Table2.A2" office:value-type="string">
            <text:p text:style-name="P48">full_name</text:p>
          </table:table-cell>
          <table:table-cell table:style-name="Table2.A2" office:value-type="string">
            <text:p text:style-name="P48">String</text:p>
          </table:table-cell>
          <table:table-cell table:style-name="Table2.C2" office:value-type="string">
            <text:p text:style-name="P48">Nombre completo del cliente</text:p>
          </table:table-cell>
        </table:table-row>
        <table:table-row>
          <table:table-cell table:style-name="Table2.A2" office:value-type="string">
            <text:p text:style-name="P48">Segment</text:p>
          </table:table-cell>
          <table:table-cell table:style-name="Table2.A2" office:value-type="string">
            <text:p text:style-name="P48">String</text:p>
          </table:table-cell>
          <table:table-cell table:style-name="Table2.C2" office:value-type="string">
            <text:p text:style-name="P48">Segmento</text:p>
          </table:table-cell>
        </table:table-row>
        <table:table-row>
          <table:table-cell table:style-name="Table2.A2" office:value-type="string">
            <text:p text:style-name="P48">card_id</text:p>
          </table:table-cell>
          <table:table-cell table:style-name="Table2.A2" office:value-type="string">
            <text:p text:style-name="P48">Int64</text:p>
          </table:table-cell>
          <table:table-cell table:style-name="Table2.C2" office:value-type="string">
            <text:p text:style-name="P48">ID de tarjeta</text:p>
          </table:table-cell>
        </table:table-row>
        <table:table-row>
          <table:table-cell table:style-name="Table2.A2" office:value-type="string">
            <text:p text:style-name="P48">card_type</text:p>
          </table:table-cell>
          <table:table-cell table:style-name="Table2.A2" office:value-type="string">
            <text:p text:style-name="P48">String</text:p>
          </table:table-cell>
          <table:table-cell table:style-name="Table2.C2" office:value-type="string">
            <text:p text:style-name="P48">Tipos de tarjetas</text:p>
          </table:table-cell>
        </table:table-row>
        <table:table-row>
          <table:table-cell table:style-name="Table2.A2" office:value-type="string">
            <text:p text:style-name="P48">card_status</text:p>
          </table:table-cell>
          <table:table-cell table:style-name="Table2.A2" office:value-type="string">
            <text:p text:style-name="P48">String</text:p>
          </table:table-cell>
          <table:table-cell table:style-name="Table2.C2" office:value-type="string">
            <text:p text:style-name="P48">Estado de la Tarjeta</text:p>
          </table:table-cell>
        </table:table-row>
        <table:table-row>
          <table:table-cell table:style-name="Table2.A2" office:value-type="string">
            <text:p text:style-name="P48">Amount</text:p>
          </table:table-cell>
          <table:table-cell table:style-name="Table2.A2" office:value-type="string">
            <text:p text:style-name="P48">Float64</text:p>
          </table:table-cell>
          <table:table-cell table:style-name="Table2.C2" office:value-type="string">
            <text:p text:style-name="P48">Monto de la transacción</text:p>
          </table:table-cell>
        </table:table-row>
        <table:table-row>
          <table:table-cell table:style-name="Table2.A2" office:value-type="string">
            <text:p text:style-name="P48">register_date</text:p>
          </table:table-cell>
          <table:table-cell table:style-name="Table2.A2" office:value-type="string">
            <text:p text:style-name="P48">Date</text:p>
          </table:table-cell>
          <table:table-cell table:style-name="Table2.C2" office:value-type="string">
            <text:p text:style-name="P48">Antiguedad del cliente</text:p>
          </table:table-cell>
        </table:table-row>
      </table:table>
      <text:p text:style-name="P21" loext:marker-style-name="T6"><text:span text:style-name="T11"/></text:p>
      <text:p text:style-name="P22"><text:span text:style-name="T12">Desnormalicé la tabla para evitar calculos en tiempo de consulta en la capa BI. Incluyo tx_date para permitir el particionado por fecha en BigQuery.</text:span></text:p>
      <text:p text:style-name="Standard" loext:marker-style-name="T11"><text:span text:style-name="T11"/></text:p>
      <text:p text:style-name="Standard" loext:marker-style-name="T10"><text:span text:style-name="T10">8️</text:span><text:span text:style-name="T9">⃣</text:span><text:span text:style-name="T10"> Pregunta conceptual </text:span></text:p>
      <text:p text:style-name="Standard" loext:marker-style-name="T2"><text:span text:style-name="T2">Pregunta:<text:line-break/></text:span><text:span text:style-name="T1">“¿Cuándo usarías particiones vs clustering en BigQuery? Explica con un ejemplo de estos datasets.”</text:span></text:p>
      <text:p text:style-name="P31"><text:span text:style-name="T2">Usaría particiones por tx_date para que las consultas de negocio siempre se realicen por periodo.</text:span></text:p>
      <text:p text:style-name="P31"><text:span text:style-name="T2">Usaría clustering por segment y card_type porque podrían ser dimensiones de análisis frecuente en BI. La combinación reduce el costo de escaneo significativamente en tablas grandes.</text:span></text:p>
      <text:p text:style-name="Standard" loext:marker-style-name="T2"><text:soft-page-break/><text:span text:style-name="T2"/></text:p>
      <text:p text:style-name="Standard" loext:marker-style-name="T10"><text:span text:style-name="T10">9️</text:span><text:span text:style-name="T9">⃣</text:span><text:span text:style-name="T10"> Mini caso</text:span></text:p>
      <text:p text:style-name="Standard" loext:marker-style-name="T4"><text:span text:style-name="T4">"Financiera OH detecta que el volumen de transacciones crecerá 10x. ¿Qué cambios aplicarías en BigQuery para evitar costos excesivos y mantener buen rendimiento?"</text:span><text:span text:style-name="T4"/></text:p>
      <text:p text:style-name="P14">Primero crearía una partición diaria por tx_date, para limitar el escaneo a rangos relevantes. Clustiring por segment y card_type para acelerar filtros frecuentes. Programar expiraciones automáticas de particiones antiguas para controlar costos de storage. Evitar consultas SELECT *, utilizando solo las columnas necesarias para evitar elevar costos.</text:p>
      <text:p text:style-name="P13" loext:marker-style-name="T5"/>
      <text:p text:style-name="P15" loext:marker-style-name="T2"/>
      <text:h text:style-name="Heading_20_1" text:outline-level="1">Parte 2</text:h>
      <text:list xml:id="list232035865487459" text:continue-list="list2454408268" text:style-name="WWNum18">
        <text:list-item text:start-value="1">
          <text:p text:style-name="P7">Unifica las tablas cards_processor_a y cards_processor_b en una estructura común.</text:p>
        </text:list-item>
        <text:list-item text:style-override="WWNum6">
          <text:p text:style-name="P5">Estandariza los valores de tipo de tarjeta y estado usando equivalence_table_extended.</text:p>
        </text:list-item>
        <text:list-item text:style-override="WWNum6">
          <text:p text:style-name="P5">Enriquece la información usando la tabla financial_rules.</text:p>
        </text:list-item>
        <text:list-item text:style-override="WWNum6">
          <text:p text:style-name="P5">Aplica las reglas financieras para obtener tasas, comisiones y seguros.</text:p>
        </text:list-item>
      </text:list>
      <text:h text:style-name="Heading_20_1" text:outline-level="1">Cálculo financiero</text:h>
      <text:p text:style-name="Standard">Calcula el campo monthly_total_cost usando la siguiente fórmula, asumiendo un saldo mensual fijo de 1000:</text:p>
      <text:p text:style-name="Standard">monthly_total_cost = interest_rate * 1000 + commission + insurance_fee</text:p>
      <text:h text:style-name="Heading_20_1" text:outline-level="1">Entregable </text:h>
      <text:p text:style-name="Standard">El resultado final debe ser una tabla llamada cards_financial_master que contenga como mínimo:</text:p>
      <text:list text:continue-list="list232034340386704" text:style-name="WWNum1">
        <text:list-item>
          <text:p text:style-name="P2">Identificador unificado de tarjeta</text:p>
        </text:list-item>
        <text:list-item>
          <text:p text:style-name="P2">Identificador de cliente</text:p>
        </text:list-item>
        <text:list-item>
          <text:p text:style-name="P2">Tipo de tarjeta estandarizado</text:p>
        </text:list-item>
        <text:list-item>
          <text:p text:style-name="P2">Estado estandarizado</text:p>
        </text:list-item>
        <text:list-item>
          <text:p text:style-name="P2">Tasa de interés, comisión y seguro</text:p>
        </text:list-item>
        <text:list-item>
          <text:p text:style-name="P2">Costo mensual total calculado</text:p>
        </text:list-item>
        <text:list-item>
          <text:p text:style-name="P2">Origen del procesador (A o B)</text:p>
        </text:list-item>
      </text:list>
      <text:h text:style-name="Heading_20_1" text:outline-level="1"/>
      <text:h text:style-name="P1" text:outline-level="1">Entrega</text:h>
      <text:p text:style-name="Standard">Debes entregar:</text:p>
      <text:list text:continue-list="list232035865487459" text:style-name="WWNum6">
        <text:list-item>
          <text:p text:style-name="P5">Script SQL completo</text:p>
        </text:list-item>
      </text:list>
      <text:p text:style-name="P19">-- En BigQuery: CREATE OR REPLACE TABLE dataset.cards_financial_master</text:p>
      <text:p text:style-name="P19">-- PARTITION BY load_date CLUSTER BY processor, customer_id, card_type, status AS (</text:p>
      <text:p text:style-name="P19">WITH unified AS (</text:p>
      <text:p text:style-name="P19">SELECT</text:p>
      <text:p text:style-name="P19">card_id_a AS card_id,</text:p>
      <text:p text:style-name="P19">customer_id,</text:p>
      <text:p text:style-name="P19">card_type_a AS card_type_raw,</text:p>
      <text:p text:style-name="P19">status_a AS status_raw,</text:p>
      <text:p text:style-name="P19">'A' AS processor</text:p>
      <text:p text:style-name="P19">FROM './archivos/cards_processor_a.csv'</text:p>
      <text:p text:style-name="P19">UNION ALL</text:p>
      <text:p text:style-name="P19">SELECT</text:p>
      <text:p text:style-name="P19">card_id_b AS card_id,</text:p>
      <text:p text:style-name="P19">customer_id,</text:p>
      <text:p text:style-name="P19">card_type_b AS card_type_raw,</text:p>
      <text:p text:style-name="P19">status_b AS status_raw,</text:p>
      <text:p text:style-name="P19">'B' AS processor</text:p>
      <text:p text:style-name="P19">FROM './archivos/cards_processor_b.csv'</text:p>
      <text:p text:style-name="P19">),</text:p>
      <text:p text:style-name="P19">standardized AS (</text:p>
      <text:p text:style-name="P19">SELECT</text:p>
      <text:p text:style-name="P19">u.card_id,</text:p>
      <text:p text:style-name="P19">u.customer_id,</text:p>
      <text:p text:style-name="P19">u.card_type_raw,</text:p>
      <text:p text:style-name="P19">u.status_raw,</text:p>
      <text:p text:style-name="P19">eq_type.value_standard AS card_type,</text:p>
      <text:p text:style-name="P19">eq_stat.value_standard AS status,</text:p>
      <text:p text:style-name="P19">u.processor</text:p>
      <text:p text:style-name="P19">FROM unified u</text:p>
      <text:p text:style-name="P19"><text:soft-page-break/>LEFT JOIN './archivos/equivalence_table_extended.csv' eq_type</text:p>
      <text:p text:style-name="P19">ON eq_type.attribute = 'card_type'</text:p>
      <text:p text:style-name="P19">AND (</text:p>
      <text:p text:style-name="P19">(u.processor = 'A' AND eq_type.value_processor_a = u.card_type_raw) OR</text:p>
      <text:p text:style-name="P19">(u.processor = 'B' AND eq_type.value_processor_b = u.card_type_raw)</text:p>
      <text:p text:style-name="P19">)</text:p>
      <text:p text:style-name="P19">LEFT JOIN './archivos/equivalence_table_extended.csv' eq_stat</text:p>
      <text:p text:style-name="P19">ON eq_stat.attribute = 'status'</text:p>
      <text:p text:style-name="P19">AND (</text:p>
      <text:p text:style-name="P19">(u.processor = 'A' AND eq_stat.value_processor_a = u.status_raw) OR</text:p>
      <text:p text:style-name="P19">(u.processor = 'B' AND eq_stat.value_processor_b = u.status_raw)</text:p>
      <text:p text:style-name="P19">)</text:p>
      <text:p text:style-name="P19">),</text:p>
      <text:p text:style-name="P19">enriched AS (</text:p>
      <text:p text:style-name="P19">SELECT</text:p>
      <text:p text:style-name="P19">s.card_id,</text:p>
      <text:p text:style-name="P19">s.customer_id,</text:p>
      <text:p text:style-name="P19">s.card_type,</text:p>
      <text:p text:style-name="P19">s.status,</text:p>
      <text:p text:style-name="P19">s.processor,</text:p>
      <text:p text:style-name="P19">f.interest_rate,</text:p>
      <text:p text:style-name="P19">f.commission,</text:p>
      <text:p text:style-name="P19">f.insurance_fee</text:p>
      <text:p text:style-name="P19">FROM standardized s</text:p>
      <text:p text:style-name="P19">LEFT JOIN './archivos/financial_rules.csv' f</text:p>
      <text:p text:style-name="P19">ON s.processor = f.processor</text:p>
      <text:p text:style-name="P19">AND s.card_type_raw = f.card_type_raw</text:p>
      <text:p text:style-name="P19">),</text:p>
      <text:p text:style-name="P19">cards_financial_master AS (</text:p>
      <text:p text:style-name="P19">SELECT</text:p>
      <text:p text:style-name="P19">card_id,</text:p>
      <text:p text:style-name="P19">customer_id,</text:p>
      <text:p text:style-name="P19">card_type,</text:p>
      <text:p text:style-name="P19">status,</text:p>
      <text:p text:style-name="P19"><text:soft-page-break/>processor,</text:p>
      <text:p text:style-name="P19">interest_rate,</text:p>
      <text:p text:style-name="P19">commission,</text:p>
      <text:p text:style-name="P19">insurance_fee,</text:p>
      <text:p text:style-name="P19">(interest_rate * 1000 + commission + insurance_fee) AS monthly_total_cost,</text:p>
      <text:p text:style-name="P19">current_date AS load_date,</text:p>
      <text:p text:style-name="P19">now() AS load_timestamp</text:p>
      <text:p text:style-name="P19">FROM enriched</text:p>
      <text:p text:style-name="P19">)</text:p>
      <text:p text:style-name="P19">SELECT * FROM cards_financial_master</text:p>
      <text:p text:style-name="P10"/>
      <text:list text:continue-numbering="true" text:style-name="WWNum6">
        <text:list-item>
          <text:p text:style-name="P6">Breve explicación del enfoque utilizado</text:p>
        </text:list-item>
      </text:list>
      <text:p text:style-name="P9"><text:span text:style-name="T16">Opté por CTEs encadenados porque permiten construir la lógica paso a paso, haciendo el pipeline legible y mantenible frente a subqueries anidados. El flujo tiene 4 etapas:</text:span></text:p>
      <text:p text:style-name="P11"><text:s/>1. unified: UNION ALL de cards_processor_a y cards_processor_b en estructura común, agregando una columna processor ('A' o 'B') para trazabilidad del origen.</text:p>
      <text:p text:style-name="P11">2. standardized: doble JOIN contra equivalence_table_extended para normalizar card_type_raw y status_raw a valores estándar (ej: GOLD_A→ GOLD, ENABLED_B → ACTIVE).</text:p>
      <text:p text:style-name="P11">3. enriched: JOIN contra financial_rules por processor + card_type_raw para incorporar interest_rate, commission e insurance_fee.</text:p>
      <text:p text:style-name="P11">4. cards_financial_master: cálculo del campo derivado monthly_total_cost = interest_rate * 1000 + commission + insurance_fee asumiendo saldo mensual fijo de 1000.</text:p>
      <text:p text:style-name="P11"><text:s/>Se usó UNION ALL en lugar de UNION para mayor eficiencia, ya que no existen duplicados entre ambos procesadores. Los JOINs de estandarización son LEFT JOIN para no perder tarjetas que eventualmente no tengan equivalencia mapeada."</text:p>
      <text:list text:continue-numbering="true" text:style-name="WWNum6">
        <text:list-header>
          <text:p text:style-name="P5"/>
        </text:list-header>
        <text:list-item>
          <text:p text:style-name="P5">Captura o resultado de la tabla final</text:p>
        </text:list-item>
      </text:list>
      <text:p text:style-name="P8"><draw:frame draw:style-name="fr1" draw:name="Image7" text:anchor-type="char" svg:width="16.51cm" svg:height="13.836cm" draw:z-index="6"><draw:image xlink:href="Pictures/1000000100000373000002E45B210F7E.png" xlink:type="simple" xlink:show="embed" xlink:actuate="onLoad" draw:mime-type="image/png"/></draw:frame><text:soft-page-break/></text:p>
      <text:h text:style-name="Heading_20_1" text:outline-level="1">Parte 3</text:h>
      <text:h text:style-name="Heading_20_2" text:outline-level="2">Desafío Intermedio – Python</text:h>
      <text:p text:style-name="Standard" loext:marker-style-name="T12"><text:span text:style-name="T12">1. Cargar todos los datasets con pandas, incluyendo transactions_anomalies.csv.</text:span><text:span text:style-name="T12"/></text:p>
      <text:p text:style-name="Standard" loext:marker-style-name="T12"><text:span text:style-name="T12">2. Realizar un Data Quality Report automático con validaciones:</text:span><text:span text:style-name="T12"/></text:p>
      <text:p text:style-name="Standard" loext:marker-style-name="T12"><text:span text:style-name="T12"><text:s text:c="3"/>- Nulls, duplicados, tipos inconsistentes, fechas inválidas.</text:span><text:span text:style-name="T12"/></text:p>
      <text:p text:style-name="Standard" loext:marker-style-name="T12"><text:span text:style-name="T12"><text:s text:c="3"/>- Valores de card_id inexistentes en los procesadores.</text:span><text:span text:style-name="T12"/></text:p>
      <text:p text:style-name="Standard" loext:marker-style-name="T12"><text:span text:style-name="T12"><text:s text:c="3"/>- Campos no documentados.</text:span><text:span text:style-name="T12"/></text:p>
      <text:p text:style-name="Standard" loext:marker-style-name="T12"><text:span text:style-name="T12">3. Generar un reporte JSON con todos los problemas detectados.</text:span><text:span text:style-name="T12"/></text:p>
      <text:p text:style-name="Standard" loext:marker-style-name="T12"><text:soft-page-break/><text:span text:style-name="T12">4. Limpiar el dataset y exportarlo como transactions_anomalies_clean.csv.</text:span><text:span text:style-name="T12"/></text:p>
      <text:p text:style-name="Standard" loext:marker-style-name="T12"><text:span text:style-name="T12">5. (Opcional) Crear un script para preparar la carga a BigQuery.</text:span></text:p>
      <text:p text:style-name="Standard" loext:marker-style-name="T12"><text:span text:style-name="T12">---</text:span></text:p>
      <text:p text:style-name="P37" loext:marker-style-name="T12"><text:span text:style-name="T12">Script de Limpieza</text:span></text:p>
      <text:p text:style-name="P23"><text:span text:style-name="T18">import</text:span><text:span text:style-name="T12"> </text:span><text:span text:style-name="T22">pandas</text:span><text:span text:style-name="T12"> </text:span><text:span text:style-name="T18">as</text:span><text:span text:style-name="T12"> </text:span><text:span text:style-name="T22">pd</text:span></text:p>
      <text:p text:style-name="P24"><text:span text:style-name="T17">import</text:span> <text:span text:style-name="T21">json</text:span></text:p>
      <text:p text:style-name="P24"><text:span text:style-name="T17">from</text:span> <text:span text:style-name="T21">datetime</text:span> <text:span text:style-name="T17">import</text:span> <text:span text:style-name="T21">date</text:span></text:p>
      <text:p text:style-name="P39"/>
      <text:p text:style-name="P38"># 1. cargando datasets</text:p>
      <text:p text:style-name="P24"><text:span text:style-name="T23">anomalias</text:span> <text:span text:style-name="T24">=</text:span> <text:span text:style-name="T21">pd</text:span>.<text:span text:style-name="T25">read_csv</text:span>(<text:span text:style-name="T26">'./archivos/transactions_anomalies.csv'</text:span>)</text:p>
      <text:p text:style-name="P24"><text:span text:style-name="T23">cards_a</text:span> <text:span text:style-name="T24">=</text:span> <text:span text:style-name="T21">pd</text:span>.<text:span text:style-name="T25">read_csv</text:span>(<text:span text:style-name="T26">'./archivos/cards_processor_a.csv'</text:span>)</text:p>
      <text:p text:style-name="P24"><text:span text:style-name="T23">cards_b</text:span> <text:span text:style-name="T24">=</text:span> <text:span text:style-name="T21">pd</text:span>.<text:span text:style-name="T25">read_csv</text:span>(<text:span text:style-name="T26">'./archivos/cards_processor_b.csv'</text:span>)</text:p>
      <text:p text:style-name="P39"/>
      <text:p text:style-name="P24"><text:span text:style-name="T23">reporte</text:span> <text:span text:style-name="T24">=</text:span> {}</text:p>
      <text:p text:style-name="P39"/>
      <text:p text:style-name="P38"># 2. Nulls por columna</text:p>
      <text:p text:style-name="P24"><text:span text:style-name="T23">reporte</text:span>[<text:span text:style-name="T26">'nulls'</text:span>] <text:span text:style-name="T24">=</text:span> {</text:p>
      <text:p text:style-name="P24"><text:span text:style-name="T23">col</text:span>: <text:span text:style-name="T21">int</text:span>(<text:span text:style-name="T23">count</text:span>) <text:span text:style-name="T17">for</text:span> <text:span text:style-name="T23">col</text:span>, <text:span text:style-name="T23">count</text:span> <text:span text:style-name="T17">in</text:span> <text:span text:style-name="T23">anomalias</text:span>.<text:span text:style-name="T25">isnull</text:span>().sum().items() <text:span text:style-name="T17">if</text:span> <text:span text:style-name="T23">count</text:span> <text:span text:style-name="T24">&gt;</text:span> <text:span text:style-name="T27">0</text:span></text:p>
      <text:p text:style-name="P24">}</text:p>
      <text:p text:style-name="P39"/>
      <text:p text:style-name="P38"># 3. duplicados</text:p>
      <text:p text:style-name="P24"><text:span text:style-name="T23">reporte</text:span>[<text:span text:style-name="T26">'duplicados'</text:span>] <text:span text:style-name="T24">=</text:span> <text:span text:style-name="T21">int</text:span>(<text:span text:style-name="T23">anomalias</text:span>.<text:span text:style-name="T25">duplicated</text:span>().<text:span text:style-name="T25">sum</text:span>())</text:p>
      <text:p text:style-name="P24"><text:span text:style-name="T23">reporte</text:span>[<text:span text:style-name="T26">'duplicados_tx_id'</text:span>] <text:span text:style-name="T24">=</text:span> <text:span text:style-name="T21">int</text:span>(<text:span text:style-name="T23">anomalias</text:span>.<text:span text:style-name="T25">duplicated</text:span>(<text:span text:style-name="T28">subset</text:span><text:span text:style-name="T24">=</text:span>[<text:span text:style-name="T26">'tx_id'</text:span>]).<text:span text:style-name="T25">sum</text:span>())</text:p>
      <text:p text:style-name="P39"/>
      <text:p text:style-name="P38"># 4. fechas</text:p>
      <text:p text:style-name="P24"><text:span text:style-name="T23">anomalias</text:span>[<text:span text:style-name="T26">'tx_date'</text:span>] <text:span text:style-name="T24">=</text:span> <text:span text:style-name="T21">pd</text:span>.<text:span text:style-name="T25">to_datetime</text:span>(<text:span text:style-name="T23">anomalias</text:span>[<text:span text:style-name="T26">'tx_date'</text:span>], <text:span text:style-name="T28">errors</text:span><text:span text:style-name="T24">=</text:span><text:span text:style-name="T26">'coerce'</text:span>)</text:p>
      <text:p text:style-name="P24"><text:span text:style-name="T23">hoy</text:span> <text:span text:style-name="T24">=</text:span> <text:span text:style-name="T21">pd</text:span>.<text:span text:style-name="T21">Timestamp</text:span>(<text:span text:style-name="T21">date</text:span>.<text:span text:style-name="T25">today</text:span>())</text:p>
      <text:p text:style-name="P24"><text:span text:style-name="T23">fechas_futuras</text:span> <text:span text:style-name="T24">=</text:span> <text:span text:style-name="T23">anomalias</text:span>[<text:span text:style-name="T23">anomalias</text:span>[<text:span text:style-name="T26">'tx_date'</text:span>] <text:span text:style-name="T29">&gt;</text:span> <text:span text:style-name="T23">hoy</text:span>]</text:p>
      <text:p text:style-name="P24"><text:span text:style-name="T23">reporte</text:span>[<text:span text:style-name="T26">'fechas_futuras'</text:span>] <text:span text:style-name="T24">=</text:span> <text:span text:style-name="T21">int</text:span>(<text:span text:style-name="T25">len</text:span>(<text:span text:style-name="T23">fechas_futuras</text:span>))</text:p>
      <text:p text:style-name="P24"><text:span text:style-name="T23">reporte</text:span>[<text:span text:style-name="T26">'tx_ids_fecha_futura'</text:span>] <text:span text:style-name="T24">=</text:span> <text:span text:style-name="T23">fechas_futuras</text:span>[<text:span text:style-name="T26">'tx_id'</text:span>].tolist()</text:p>
      <text:p text:style-name="P39"/>
      <text:p text:style-name="P38"># 5. existen A o B</text:p>
      <text:p text:style-name="P24"><text:span text:style-name="T23">ids_validos</text:span> <text:span text:style-name="T24">=</text:span> <text:span text:style-name="T21">set</text:span>(<text:span text:style-name="T23">cards_a</text:span>[<text:span text:style-name="T26">'card_id_a'</text:span>]).<text:span text:style-name="T25">union</text:span>(<text:span text:style-name="T21">set</text:span>(<text:span text:style-name="T23">cards_b</text:span>[<text:span text:style-name="T26">'card_id_b'</text:span>]))</text:p>
      <text:p text:style-name="P24"><text:span text:style-name="T23">card_ids_invalidos</text:span> <text:span text:style-name="T24">=</text:span> <text:span text:style-name="T23">anomalias</text:span>[<text:span text:style-name="T29">~</text:span><text:span text:style-name="T23">anomalias</text:span>[<text:span text:style-name="T26">'card_id'</text:span>].<text:span text:style-name="T25">isin</text:span>(<text:span text:style-name="T23">ids_validos</text:span>)]</text:p>
      <text:p text:style-name="P24"><text:span text:style-name="T23">reporte</text:span>[<text:span text:style-name="T26">'card_ids_invalidos'</text:span>] <text:span text:style-name="T24">=</text:span> <text:span text:style-name="T21">int</text:span>(<text:span text:style-name="T25">len</text:span>(<text:span text:style-name="T23">card_ids_invalidos</text:span>))</text:p>
      <text:p text:style-name="P24"><text:span text:style-name="T23">reporte</text:span>[<text:span text:style-name="T26">'card_ids_invalidos_valores'</text:span>] <text:span text:style-name="T24">=</text:span> <text:span text:style-name="T23">card_ids_invalidos</text:span>[<text:span text:style-name="T26">'card_id'</text:span>].dropna().unique().tolist()</text:p>
      <text:p text:style-name="P39"/>
      <text:p text:style-name="P38"># 6. campos no documentados</text:p>
      <text:p text:style-name="P24"><text:span text:style-name="T23">columnas_esperadas</text:span> <text:span text:style-name="T24">=</text:span> {<text:span text:style-name="T26">'tx_id'</text:span>,<text:span text:style-name="T26">'card_id'</text:span>,<text:span text:style-name="T26">'amount'</text:span>,<text:span text:style-name="T26">'tx_date'</text:span>}</text:p>
      <text:p text:style-name="P24"><text:span text:style-name="T23">columnas_actuales</text:span> <text:span text:style-name="T24">=</text:span> <text:span text:style-name="T21">set</text:span>(<text:span text:style-name="T23">anomalias</text:span>.<text:span text:style-name="T23">columns</text:span>)</text:p>
      <text:p text:style-name="P24"><text:soft-page-break/><text:span text:style-name="T23">campos_no_documentados</text:span> <text:span text:style-name="T24">=</text:span> <text:span text:style-name="T23">columnas_actuales</text:span> <text:span text:style-name="T24">-</text:span> <text:span text:style-name="T23">columnas_esperadas</text:span></text:p>
      <text:p text:style-name="P24"><text:span text:style-name="T23">reporte</text:span>[<text:span text:style-name="T26">'campos_no_documentados'</text:span>] <text:span text:style-name="T24">=</text:span> <text:span text:style-name="T21">list</text:span>(<text:span text:style-name="T23">campos_no_documentados</text:span>)</text:p>
      <text:p text:style-name="P39"/>
      <text:p text:style-name="P38"># 7. montos negativos</text:p>
      <text:p text:style-name="P24"><text:span text:style-name="T23">montos_negativos</text:span> <text:span text:style-name="T24">=</text:span> <text:span text:style-name="T23">anomalias</text:span>[<text:span text:style-name="T23">anomalias</text:span>[<text:span text:style-name="T26">'amount'</text:span>] <text:span text:style-name="T29">&lt;</text:span> <text:span text:style-name="T27">0</text:span>]</text:p>
      <text:p text:style-name="P24"><text:span text:style-name="T23">reporte</text:span>[<text:span text:style-name="T26">'montos_negativos'</text:span>] <text:span text:style-name="T24">=</text:span> <text:span text:style-name="T21">int</text:span>(<text:span text:style-name="T25">len</text:span>(<text:span text:style-name="T23">montos_negativos</text:span>))</text:p>
      <text:p text:style-name="P24"><text:span text:style-name="T23">reporte</text:span>[<text:span text:style-name="T26">'tx_ids_monto_negativo'</text:span>] <text:span text:style-name="T24">=</text:span> <text:span text:style-name="T23">montos_negativos</text:span>[<text:span text:style-name="T26">'tx_id'</text:span>].tolist()</text:p>
      <text:p text:style-name="P39"/>
      <text:p text:style-name="P38"># reporte</text:p>
      <text:p text:style-name="P24"><text:span text:style-name="T17">with</text:span> <text:span text:style-name="T25">open</text:span>(<text:span text:style-name="T26">'./archivos/data_quality_report.json'</text:span>,<text:span text:style-name="T26">'w'</text:span>) <text:span text:style-name="T17">as</text:span> <text:span text:style-name="T23">f</text:span>:</text:p>
      <text:p text:style-name="P24"><text:span text:style-name="T21">json</text:span>.<text:span text:style-name="T25">dump</text:span>(<text:span text:style-name="T23">reporte</text:span>, <text:span text:style-name="T23">f</text:span>, <text:span text:style-name="T28">indent</text:span><text:span text:style-name="T24">=</text:span><text:span text:style-name="T27">4</text:span>, <text:span text:style-name="T28">default</text:span><text:span text:style-name="T24">=</text:span><text:span text:style-name="T21">str</text:span>)</text:p>
      <text:p text:style-name="P24"><text:span text:style-name="T25">print</text:span>(<text:span text:style-name="T26">'Reporte generado'</text:span>)</text:p>
      <text:p text:style-name="P39"/>
      <text:p text:style-name="P38"># limpieza</text:p>
      <text:p text:style-name="P24"><text:span text:style-name="T23">clean</text:span> <text:span text:style-name="T24">=</text:span> <text:span text:style-name="T23">anomalias</text:span>.<text:span text:style-name="T25">copy</text:span>()</text:p>
      <text:p text:style-name="P24"><text:span text:style-name="T23">clean</text:span> <text:span text:style-name="T24">=</text:span> <text:span text:style-name="T23">clean</text:span>.dropna(<text:span text:style-name="T28">subset</text:span><text:span text:style-name="T24">=</text:span>[<text:span text:style-name="T26">'card_id'</text:span>,<text:span text:style-name="T26">'amount'</text:span>,<text:span text:style-name="T26">'tx_date'</text:span>]) <text:span text:style-name="T30">#quita nulos</text:span></text:p>
      <text:p text:style-name="P24"><text:span text:style-name="T23">clean</text:span> <text:span text:style-name="T24">=</text:span> <text:span text:style-name="T23">clean</text:span>[<text:span text:style-name="T23">clean</text:span>[<text:span text:style-name="T26">'tx_date'</text:span>] <text:span text:style-name="T29">&lt;=</text:span> <text:span text:style-name="T23">hoy</text:span>] <text:span text:style-name="T30"># quita fechas</text:span></text:p>
      <text:p text:style-name="P24"><text:span text:style-name="T23">clean</text:span> <text:span text:style-name="T24">=</text:span> <text:span text:style-name="T23">clean</text:span>[<text:span text:style-name="T23">clean</text:span>[<text:span text:style-name="T26">'card_id'</text:span>].isin(<text:span text:style-name="T23">ids_validos</text:span>)] <text:span text:style-name="T30"># quita card_ids invalidos</text:span></text:p>
      <text:p text:style-name="P24"><text:span text:style-name="T23">clean</text:span> <text:span text:style-name="T24">=</text:span> <text:span text:style-name="T23">clean</text:span>[<text:span text:style-name="T23">clean</text:span>[<text:span text:style-name="T26">'amount'</text:span>]<text:span text:style-name="T24">&gt;</text:span><text:span text:style-name="T27">0</text:span>] <text:span text:style-name="T30"># quitar montos negativos</text:span></text:p>
      <text:p text:style-name="P24"><text:span text:style-name="T23">clean</text:span> <text:span text:style-name="T24">=</text:span> <text:span text:style-name="T23">clean</text:span>.drop(<text:span text:style-name="T28">columns</text:span><text:span text:style-name="T24">=</text:span>[<text:span text:style-name="T26">'extra_column'</text:span>]) <text:span text:style-name="T30"># quita campo no documentado</text:span></text:p>
      <text:p text:style-name="P24"><text:span text:style-name="T23">clean</text:span>.to_csv(<text:span text:style-name="T26">'./archivos/transactions_anomalias_clean.csv'</text:span>, <text:span text:style-name="T28">index</text:span><text:span text:style-name="T24">=</text:span><text:span text:style-name="T31">False</text:span>)</text:p>
      <text:p text:style-name="P24"><text:span text:style-name="T25">print</text:span>(<text:span text:style-name="T32">f</text:span><text:span text:style-name="T26">'Archivo limpio exportado: </text:span><text:span text:style-name="T32">{</text:span><text:span text:style-name="T25">len</text:span>(<text:span text:style-name="T23">clean</text:span>)<text:span text:style-name="T32">}</text:span><text:span text:style-name="T26"> filas de </text:span><text:span text:style-name="T32">{</text:span><text:span text:style-name="T29">len</text:span>(<text:span text:style-name="T23">anomalias</text:span>)<text:span text:style-name="T32">}</text:span><text:span text:style-name="T26"> originales'</text:span>)</text:p>
      <text:p text:style-name="P37" loext:marker-style-name="T12"><text:span text:style-name="T12"/></text:p>
      <text:p text:style-name="P37" loext:marker-style-name="T12"><text:span text:style-name="T12">Resultados:</text:span></text:p>
      <text:section text:style-name="Sect1" text:name="Section1" text:protected="true">
        <text:section-source xlink:href="../data_quality_report.json"/>
        <text:p text:style-name="Preformatted_20_Text">{</text:p>
        <text:p text:style-name="Preformatted_20_Text"><text:s text:c="4"/>"nulls": {</text:p>
        <text:p text:style-name="Preformatted_20_Text"><text:s text:c="8"/>"card_id": 4,</text:p>
        <text:p text:style-name="Preformatted_20_Text"><text:s text:c="8"/>"amount": 5,</text:p>
        <text:p text:style-name="Preformatted_20_Text"><text:s text:c="8"/>"tx_date": 9,</text:p>
        <text:p text:style-name="Preformatted_20_Text"><text:s text:c="8"/>"extra_column": 9</text:p>
        <text:p text:style-name="Preformatted_20_Text"><text:s text:c="4"/>},</text:p>
        <text:p text:style-name="Preformatted_20_Text"><text:s text:c="4"/>"duplicados": 0,</text:p>
        <text:p text:style-name="Preformatted_20_Text"><text:s text:c="4"/>"duplicados_tx_id": 0,</text:p>
        <text:p text:style-name="Preformatted_20_Text"><text:s text:c="4"/>"fechas_futuras": 5,</text:p>
        <text:p text:style-name="Preformatted_20_Text"><text:s text:c="4"/>"tx_ids_fecha_futura": [</text:p>
        <text:p text:style-name="Preformatted_20_Text"><text:s text:c="8"/>9001,</text:p>
        <text:p text:style-name="Preformatted_20_Text"><text:s text:c="8"/>9007,</text:p>
        <text:p text:style-name="Preformatted_20_Text"><text:s text:c="8"/>9013,</text:p>
        <text:p text:style-name="Preformatted_20_Text"><text:s text:c="8"/>9015,</text:p>
        <text:p text:style-name="Preformatted_20_Text"><text:s text:c="8"/>9016</text:p>
        <text:p text:style-name="Preformatted_20_Text"><text:s text:c="4"/>],</text:p>
        <text:p text:style-name="Preformatted_20_Text"><text:s text:c="4"/>"card_ids_invalidos": 7,</text:p>
        <text:p text:style-name="Preformatted_20_Text"><text:s text:c="4"/>"card_ids_invalidos_valores": [</text:p>
        <text:p text:style-name="Preformatted_20_Text"><text:s text:c="8"/>"X9999"</text:p>
        <text:p text:style-name="Preformatted_20_Text"><text:s text:c="4"/>],</text:p>
        <text:p text:style-name="Preformatted_20_Text"><text:soft-page-break/><text:s text:c="4"/>"campos_no_documentados": [</text:p>
        <text:p text:style-name="Preformatted_20_Text"><text:s text:c="8"/>"extra_column"</text:p>
        <text:p text:style-name="Preformatted_20_Text"><text:s text:c="4"/>],</text:p>
        <text:p text:style-name="Preformatted_20_Text"><text:s text:c="4"/>"montos_negativos": 9,</text:p>
        <text:p text:style-name="Preformatted_20_Text"><text:s text:c="4"/>"tx_ids_monto_negativo": [</text:p>
        <text:p text:style-name="Preformatted_20_Text"><text:s text:c="8"/>9003,</text:p>
        <text:p text:style-name="Preformatted_20_Text"><text:s text:c="8"/>9004,</text:p>
        <text:p text:style-name="Preformatted_20_Text"><text:s text:c="8"/>9005,</text:p>
        <text:p text:style-name="Preformatted_20_Text"><text:s text:c="8"/>9007,</text:p>
        <text:p text:style-name="Preformatted_20_Text"><text:s text:c="8"/>9009,</text:p>
        <text:p text:style-name="Preformatted_20_Text"><text:s text:c="8"/>9011,</text:p>
        <text:p text:style-name="Preformatted_20_Text"><text:s text:c="8"/>9012,</text:p>
        <text:p text:style-name="Preformatted_20_Text"><text:s text:c="8"/>9013,</text:p>
        <text:p text:style-name="Preformatted_20_Text"><text:s text:c="8"/>9017</text:p>
        <text:p text:style-name="Preformatted_20_Text"><text:s text:c="4"/>]</text:p>
        <text:p text:style-name="Preformatted_20_Text">}</text:p>
      </text:section>
      <text:p text:style-name="P37" loext:marker-style-name="T12"><text:span text:style-name="T12"/></text:p>
      <text:section text:style-name="Sect1" text:name="Section2" text:protected="true">
        <text:section-source xlink:href="../transactions_anomalias_clean.csv"/>
        <text:p text:style-name="Preformatted_20_Text">tx_id,card_id,amount,tx_date</text:p>
        <text:p text:style-name="Preformatted_20_Text">9019,B2003,50.0,2023-01-10</text:p>
      </text:section>
      <text:p text:style-name="P37" loext:marker-style-name="T12"><text:span text:style-name="T12"/></text:p>
      <text:p text:style-name="P37" loext:marker-style-name="T12"><text:span text:style-name="T12">---</text:span></text:p>
      <text:p text:style-name="P37" loext:marker-style-name="T12"><text:span text:style-name="T12">Script de carga BigQUery</text:span></text:p>
      <text:p text:style-name="P25"><text:span text:style-name="T18">from</text:span><text:span text:style-name="T12"> </text:span><text:span text:style-name="T22">google</text:span><text:span text:style-name="T12">.</text:span><text:span text:style-name="T22">cloud</text:span><text:span text:style-name="T12"> </text:span><text:span text:style-name="T18">import</text:span><text:span text:style-name="T12"> bigquery</text:span></text:p>
      <text:p text:style-name="P24"><text:span text:style-name="T17">import</text:span> <text:span text:style-name="T21">pandas</text:span> <text:span text:style-name="T17">as</text:span> <text:span text:style-name="T21">pd</text:span></text:p>
      <text:p text:style-name="P39"/>
      <text:p text:style-name="P38"># configuracion</text:p>
      <text:p text:style-name="P24"><text:span text:style-name="T33">PROJECT_ID</text:span> <text:span text:style-name="T24">=</text:span> <text:span text:style-name="T26">'proyecto_gcp'</text:span></text:p>
      <text:p text:style-name="P24"><text:span text:style-name="T33">DATASET_ID</text:span> <text:span text:style-name="T24">=</text:span> <text:span text:style-name="T26">'examen_tecnico'</text:span></text:p>
      <text:p text:style-name="P24"><text:span text:style-name="T33">TABLE_ID</text:span> <text:span text:style-name="T24">=</text:span> <text:span text:style-name="T26">'transactions_anomalies_clean'</text:span></text:p>
      <text:p text:style-name="P39"/>
      <text:p text:style-name="P38"># carga csv limpio</text:p>
      <text:p text:style-name="P24"><text:span text:style-name="T23">df</text:span> <text:span text:style-name="T24">=</text:span> <text:span text:style-name="T21">pd</text:span>.<text:span text:style-name="T25">read_csv</text:span>(<text:span text:style-name="T26">'./archivos/transactions_anomalias_clean.csv'</text:span>)</text:p>
      <text:p text:style-name="P39"/>
      <text:p text:style-name="P38"># cliente bigquery</text:p>
      <text:p text:style-name="P24"><text:span text:style-name="T23">client</text:span> <text:span text:style-name="T24">=</text:span> bigquery.Client(<text:span text:style-name="T28">project</text:span><text:span text:style-name="T24">=</text:span><text:span text:style-name="T33">PROJECT_ID</text:span>)</text:p>
      <text:p text:style-name="P39"/>
      <text:p text:style-name="P38"># evitando que coloque tipos incorrectos</text:p>
      <text:p text:style-name="P24"><text:span text:style-name="T23">schema</text:span> <text:span text:style-name="T24">=</text:span> [</text:p>
      <text:p text:style-name="P24">bigquery.SchemaField(<text:span text:style-name="T26">'tx_id'</text:span>,<text:span text:style-name="T26">'INT64'</text:span>),</text:p>
      <text:p text:style-name="P24">bigquery.SchemaField(<text:span text:style-name="T26">'card_id'</text:span>,<text:span text:style-name="T26">'STRING'</text:span>),</text:p>
      <text:p text:style-name="P24">bigquery.SchemaField(<text:span text:style-name="T26">'amount'</text:span>,<text:span text:style-name="T26">'FLOAT64'</text:span>),</text:p>
      <text:p text:style-name="P24">bigquery.SchemaField(<text:span text:style-name="T26">'tx_date'</text:span>,<text:span text:style-name="T26">'DATE'</text:span>),</text:p>
      <text:p text:style-name="P24"><text:soft-page-break/>]</text:p>
      <text:p text:style-name="P39"/>
      <text:p text:style-name="P38"># configuración de la carga</text:p>
      <text:p text:style-name="P24"><text:span text:style-name="T23">job_config</text:span> <text:span text:style-name="T24">=</text:span> bigquery.LoadJobConfig(</text:p>
      <text:p text:style-name="P24"><text:span text:style-name="T28">schema</text:span> <text:span text:style-name="T24">=</text:span> <text:span text:style-name="T23">schema</text:span>,</text:p>
      <text:p text:style-name="P24"><text:span text:style-name="T28">write_disposition</text:span> <text:span text:style-name="T24">=</text:span> bigquery.WriteDisposition.<text:span text:style-name="T33">WRITE_TRUNCATE</text:span>,</text:p>
      <text:p text:style-name="P24">)</text:p>
      <text:p text:style-name="P39"/>
      <text:p text:style-name="P38"># ejecución</text:p>
      <text:p text:style-name="P24"><text:span text:style-name="T23">table_ref</text:span> <text:span text:style-name="T24">=</text:span> <text:span text:style-name="T32">f</text:span><text:span text:style-name="T26">'</text:span><text:span text:style-name="T32">{</text:span><text:span text:style-name="T33">PROJECT_ID</text:span><text:span text:style-name="T32">}</text:span><text:span text:style-name="T26">.</text:span><text:span text:style-name="T32">{</text:span><text:span text:style-name="T33">DATASET_ID</text:span><text:span text:style-name="T32">}</text:span><text:span text:style-name="T26">.</text:span><text:span text:style-name="T32">{</text:span><text:span text:style-name="T33">TABLE_ID</text:span><text:span text:style-name="T32">}</text:span><text:span text:style-name="T26">'</text:span></text:p>
      <text:p text:style-name="P24"><text:span text:style-name="T23">job</text:span> <text:span text:style-name="T24">=</text:span> <text:span text:style-name="T23">client</text:span>.load_table_from_dataframe(<text:span text:style-name="T23">df</text:span>,<text:span text:style-name="T23">table_ref</text:span>,<text:span text:style-name="T28">job_config</text:span><text:span text:style-name="T24">=</text:span><text:span text:style-name="T23">job_config</text:span>)</text:p>
      <text:p text:style-name="P24"><text:span text:style-name="T23">job</text:span>.result()</text:p>
      <text:p text:style-name="P39"/>
      <text:p text:style-name="P24"><text:span text:style-name="T25">print</text:span>(<text:span text:style-name="T32">f</text:span><text:span text:style-name="T26">'Cargadas </text:span><text:span text:style-name="T32">{</text:span><text:span text:style-name="T23">job</text:span>.output_rows<text:span text:style-name="T32">}</text:span><text:span text:style-name="T26"> filas en </text:span><text:span text:style-name="T32">{</text:span><text:span text:style-name="T23">table_ref</text:span><text:span text:style-name="T32">}</text:span><text:span text:style-name="T26">'</text:span>)</text:p>
      <text:p text:style-name="Standard" loext:marker-style-name="T12"><text:span text:style-name="T12"/></text:p>
      <text:h text:style-name="Heading_20_2" text:outline-level="2">Desafío Avanzado – IA Generativa + Ingeniería de Datos</text:h>
      <text:p text:style-name="P29"><text:span text:style-name="T12">A) Usar IA para generar una propuesta de SQL completo del caso y luego auditarlo manualmente.</text:span></text:p>
      <text:p text:style-name="P32"><text:span text:style-name="T13">Solicité a la IA</text:span><text:span text:style-name="T12"> generativa (Claude) estructurar el pipeline de datos. </text:span><text:span text:style-name="T13">Realicé la auditoria de su proceso y esto fue lo que pude detectar.</text:span></text:p>
      <text:p text:style-name="P33"><text:span text:style-name="T12">Lo que la IA generó correctamente:</text:span></text:p>
      <text:list text:style-name="L1">
        <text:list-item>
          <text:p text:style-name="P34"><text:span text:style-name="T12">Estructura de CTEs encadenados para cards_financial_master</text:span></text:p>
        </text:list-item>
        <text:list-item>
          <text:p text:style-name="P34"><text:span text:style-name="T12">Lógica del doble JOIN contra equivalence_table_extended con condición por procesador</text:span></text:p>
        </text:list-item>
        <text:list-item>
          <text:p text:style-name="P34"><text:span text:style-name="T12">Subquery con PERCENTILE_CONT para transacciones sospechosas</text:span></text:p>
        </text:list-item>
        <text:list-item>
          <text:p text:style-name="P34"><text:span text:style-name="T12">Script de Data Quality con pandas</text:span></text:p>
        </text:list-item>
      </text:list>
      <text:p text:style-name="P33"><text:span text:style-name="T12">Errores que detecté al auditar manualmente:</text:span></text:p>
      <text:p text:style-name="P33"><text:span text:style-name="T12">La IA usó equivalence_table.csv en lugar de equivalence_table_extended.csv — corregido revisando los archivos disponibles.</text:span></text:p>
      <text:p text:style-name="P33"><text:span text:style-name="T12">Faltaba .show() en la query de la pregunta 2 — detectado al ejecutar y ver que no imprimía.</text:span></text:p>
      <text:p text:style-name="P33"><text:span text:style-name="T12">PERCENTILE_CCNT con typo y sintaxis incorrecta — corregido entendiendo cómo funciona el subquer</text:span><text:span text:style-name="T13">y.</text:span></text:p>
      <text:p text:style-name="P33"><text:soft-page-break/><text:span text:style-name="T12">El schema era set {} en lugar de list [] para BigQuery — corregido conociendo la API</text:span></text:p>
      <text:p text:style-name="P32"><text:span text:style-name="T12">Conclusión: La IA acelera la generación de código pero requiere auditoría humana obligatoria. Los errores que cometió fueron de detalle (nombres de archivos, typos, sintaxis), no de lógica. El ingeniero debe entender cada línea para poder detectarlos.</text:span></text:p>
      <text:p text:style-name="P29"><text:span text:style-name="T12">B) Usar IA para detectar inconsistencias en business_rules_text.csv y convertirlas en reglas SQL.</text:span></text:p>
      <text:p text:style-name="P40"/>
      <table:table table:name="Table3" table:style-name="Table3">
        <table:table-column table:style-name="Table3.A" table:number-columns-repeated="3"/>
        <table:table-column table:style-name="Table3.D"/>
        <table:table-row table:style-name="Table3.1">
          <table:table-cell table:style-name="Table3.A1" office:value-type="string">
            <text:p text:style-name="P42"><text:span text:style-name="T34">REGLA</text:span></text:p>
          </table:table-cell>
          <table:table-cell table:style-name="Table3.A1" office:value-type="string">
            <text:p text:style-name="P42"><text:span text:style-name="T34">INTERPRETACIÓN FUNCIONAL</text:span></text:p>
          </table:table-cell>
          <table:table-cell table:style-name="Table3.A1" office:value-type="string">
            <text:p text:style-name="P42"><text:span text:style-name="T34">TRADUCCIÓN SQL</text:span></text:p>
          </table:table-cell>
          <table:table-cell table:style-name="Table3.A1" office:value-type="string">
            <text:p text:style-name="P42"><text:span text:style-name="T34">INCONSISTENCIA / LECTURA CORRECTA</text:span></text:p>
          </table:table-cell>
        </table:table-row>
        <table:table-row table:style-name="Table3.1">
          <table:table-cell table:style-name="Table3.A1" office:value-type="string">
            <text:p text:style-name="P43"><text:span text:style-name="T35">Regla 1<text:line-break/>GOLD_A migra a GOLD_ESTÁNDAR salvo si BLOCKED_A</text:span></text:p>
          </table:table-cell>
          <table:table-cell table:style-name="Table3.A1" office:value-type="string">
            <text:p text:style-name="P43"><text:span text:style-name="T35">Reclasificar tarjetas GOLD_A activas a un producto nuevo.</text:span></text:p>
          </table:table-cell>
          <table:table-cell table:style-name="Table3.A1" office:value-type="string">
            <text:p text:style-name="P43"><text:span text:style-name="T35">CASE WHEN card_type_a = 'GOLD_A'<text:line-break/> <text:s/>AND status_a != 'BLOCKED_A'<text:line-break/> <text:s/>THEN 'GOLD'<text:line-break/> <text:s/>ELSE value_standard<text:line-break/>END AS card_type</text:span></text:p>
          </table:table-cell>
          <table:table-cell table:style-name="Table3.A1" office:value-type="string">
            <text:p text:style-name="P43"><text:span text:style-name="T35">GOLD_ESTÁNDAR no existe en equivalence_table_extended. Los valores estándar son GOLD, SILVER, BRONZE. La regla debería decir GOLD.</text:span></text:p>
          </table:table-cell>
        </table:table-row>
        <table:table-row table:style-name="Table3.1">
          <table:table-cell table:style-name="Table3.A1" office:value-type="string">
            <text:p text:style-name="P43"><text:span text:style-name="T35">Regla 2<text:line-break/>SILVER_B emitida antes de 2020 → LEGACY_SILVER</text:span></text:p>
          </table:table-cell>
          <table:table-cell table:style-name="Table3.A1" office:value-type="string">
            <text:p text:style-name="P43"><text:span text:style-name="T35">Identificar tarjetas antiguas y reclasificarlas como producto legacy.</text:span></text:p>
          </table:table-cell>
          <table:table-cell table:style-name="Table3.A1" office:value-type="string">
            <text:p text:style-name="P43"><text:span text:style-name="T35">❌ No implementable con los datos actuales.</text:span></text:p>
          </table:table-cell>
          <table:table-cell table:style-name="Table3.A1" office:value-type="string">
            <text:p text:style-name="P43"><text:span text:style-name="T35">cards_processor_b no tiene columna de fecha de emisión. Además LEGACY_SILVER no existe en la tabla de equivalencias. Se requiere agregar issue_date.</text:span></text:p>
          </table:table-cell>
        </table:table-row>
        <table:table-row table:style-name="Table3.1">
          <table:table-cell table:style-name="Table3.A1" office:value-type="string">
            <text:p text:style-name="P43"><text:span text:style-name="T35">Regla 3<text:line-break/>BRONZE con &gt;20 tx mensuales → comisión reducida</text:span></text:p>
          </table:table-cell>
          <table:table-cell table:style-name="Table3.A1" office:value-type="string">
            <text:p text:style-name="P43"><text:span text:style-name="T35">Detectar tarjetas de alto uso y aplicar beneficio comercial.</text:span></text:p>
          </table:table-cell>
          <table:table-cell table:style-name="Table3.A1" office:value-type="string">
            <text:p text:style-name="P43"><text:span text:style-name="T35">SELECT card_id, COUNT(*) AS tx_mes<text:line-break/>FROM transactions<text:line-break/>GROUP BY card_id,<text:line-break/> <text:s/>DATE_TRUNC(tx_date, MONTH)<text:line-break/>HAVING COUNT(*) &gt; 20</text:span></text:p>
          </table:table-cell>
          <table:table-cell table:style-name="Table3.A1" office:value-type="string">
            <text:p text:style-name="P43"><text:span text:style-name="T35">Dos problemas: (1) cards_processor no tiene historial de transacciones — requiere JOIN con transactions. (2) "comisión reducida" no está cuantificada. Debe definirse en financial_rules.</text:span></text:p>
          </table:table-cell>
        </table:table-row>
        <table:table-row table:style-name="Table3.1">
          <table:table-cell table:style-name="Table3.A1" office:value-type="string">
            <text:p text:style-name="P43"><text:span text:style-name="T35">Regla 4<text:line-break/>Cliente Gold con ≥2 tarjetas activas → beneficio premium</text:span></text:p>
          </table:table-cell>
          <table:table-cell table:style-name="Table3.A1" office:value-type="string">
            <text:p text:style-name="P43"><text:span text:style-name="T35">Identificar clientes premium para aplicar ventaja comercial.</text:span></text:p>
          </table:table-cell>
          <table:table-cell table:style-name="Table3.A1" office:value-type="string">
            <text:p text:style-name="P43"><text:span text:style-name="T35">SELECT cu.customer_id, cu.full_name<text:line-break/>FROM customers cu<text:line-break/>INNER JOIN cards ca<text:line-break/> <text:s/>ON cu.customer_id = ca.customer_id<text:line-break/>WHERE cu.segment = 'Gold'<text:line-break/> <text:s/>AND ca.status = 'Active'<text:line-break/>GROUP BY cu.customer_id, cu.full_name<text:line-break/>HAVING COUNT(ca.card_id) &gt;= 2</text:span></text:p>
          </table:table-cell>
          <table:table-cell table:style-name="Table3.A1" office:value-type="string">
            <text:p text:style-name="P43"><text:span text:style-name="T35">La detección es implementable, pero "beneficio premium" no está cuantificado. No se sabe si es descuento en tasa, comisión cero, etc. Debe definirse en financial_rules.</text:span></text:p>
          </table:table-cell>
        </table:table-row>
      </table:table>
      <text:p text:style-name="P41" loext:marker-style-name="T12"/>
      <text:p text:style-name="P35">Conclusiones</text:p>
      <text:p text:style-name="P35">De las 4 reglas, solo la Regla 1 y parcialmente la Regla 4 son implementables con los datos disponibles. Las reglas 2 y 3 tienen dependencias de datos faltantes (fecha de emisión, volumen de transacciones mensual). Las 4 reglas usan términos no estandarizados (GOLD_ESTÁNDAR, LEGACY_SILVER, comisión reducida, <text:soft-page-break/>beneficio premium) que deben formalizarse en las tablas de referencia antes de traducirse a SQL productivo.</text:p>
      <text:p text:style-name="P29"><text:span text:style-name="T12">C) Usar IA para generar documentación automática del pipeline del caso.</text:span></text:p>
      <text:p text:style-name="Standard" loext:marker-style-name="T12"><text:span text:style-name="T12"/></text:p>
      <text:p text:style-name="P30"><text:span text:style-name="T12">D) Explicar cuándo usar IA para debugging y cuándo no hacerlo por riesgo.</text:span></text:p>
      <text:p text:style-name="P45" loext:marker-style-name="T12"><text:span text:style-name="T36">Cuándo SÍ usar IA:</text:span></text:p>
      <text:list text:style-name="L2">
        <text:list-item>
          <text:p text:style-name="P46"><text:span text:style-name="T36">Optimización de queries SQL (identificar índices faltantes, reescribir subqueries ineficientes).</text:span></text:p>
        </text:list-item>
        <text:list-item>
          <text:p text:style-name="P46"><text:span text:style-name="T36">Análisis de mensajes de error y sugerencia de causa raíz.</text:span></text:p>
        </text:list-item>
        <text:list-item>
          <text:p text:style-name="P46"><text:span text:style-name="T36">Generación de código repetitivo o boilerplate (schemas, scripts de carga).</text:span></text:p>
        </text:list-item>
        <text:list-item>
          <text:p text:style-name="P46"><text:span text:style-name="T36">Revisión de lógica en pipelines cuando el error no es evidente.</text:span></text:p>
        </text:list-item>
        <text:list-item>
          <text:p text:style-name="P46" loext:marker-style-name="T12"><text:span text:style-name="T36">Documentación automática de código y pipelines.</text:span></text:p>
        </text:list-item>
      </text:list>
      <text:p text:style-name="P44">En todos estos casos, la condición es que el ingeniero entienda y valide cada sugerencia antes de implementarla, verificando que cumple los estándares de la organización.</text:p>
      <text:p text:style-name="P44">Cuándo NO usar IA:</text:p>
      <table:table table:name="Table4" table:style-name="Table4">
        <table:table-column table:style-name="Table4.A" table:number-columns-repeated="2"/>
        <table:table-row>
          <table:table-cell table:style-name="Table4.A1" office:value-type="string">
            <text:p text:style-name="P50">Riesgo</text:p>
          </table:table-cell>
          <table:table-cell table:style-name="Table4.B1" office:value-type="string">
            <text:p text:style-name="P50">Cómo Evitarlo</text:p>
          </table:table-cell>
        </table:table-row>
        <table:table-row>
          <table:table-cell table:style-name="Table4.A2" office:value-type="string">
            <text:p text:style-name="P44">Cargar datos con información personal (nombres, DNI, números de tarjeta reales).</text:p>
          </table:table-cell>
          <table:table-cell table:style-name="Table4.B2" office:value-type="string">
            <text:p text:style-name="P44">Viola la Ley de Protección de Datos y la ética profesional. Los modelos pueden retener o exponer esa información.</text:p>
          </table:table-cell>
        </table:table-row>
        <table:table-row>
          <table:table-cell table:style-name="Table4.A2" office:value-type="string">
            <text:p text:style-name="P44">Exponer credenciales, API keys o contraseñas en el prompt.</text:p>
          </table:table-cell>
          <table:table-cell table:style-name="Table4.B2" office:value-type="string">
            <text:p text:style-name="P44">Riesgo de fuga de seguridad crítica.</text:p>
          </table:table-cell>
        </table:table-row>
        <table:table-row table:style-name="Table4.4">
          <table:table-cell table:style-name="Table4.A2" office:value-type="string">
            <text:p text:style-name="P44">Confiar ciegamente en SQL generado sin auditarlo.</text:p>
          </table:table-cell>
          <table:table-cell table:style-name="Table4.B2" office:value-type="string">
            <text:p text:style-name="P44">La IA puede generar queries correctas sintácticamente pero con lógica incorrecta (JOINs erróneos, condiciones invertidas).</text:p>
          </table:table-cell>
        </table:table-row>
        <text:soft-page-break/>
        <table:table-row table:style-name="Table4.4">
          <table:table-cell table:style-name="Table4.A2" office:value-type="string">
            <text:p text:style-name="P44">Decisiones de arquitectura en producción sin revisión humana.</text:p>
          </table:table-cell>
          <table:table-cell table:style-name="Table4.B2" office:value-type="string">
            <text:p text:style-name="P44">La IA no conoce el contexto real del negocio, volumetría real ni restricciones de costos.</text:p>
          </table:table-cell>
        </table:table-row>
      </table:table>
      <text:p text:style-name="P44"/>
      <text:p text:style-name="P36">Buena práctica al usar IA con datos reales: enmascarar o anonimizar los datos antes de compartirlos (reemplazar nombres reales por "Cliente 1", tarjetas por IDs ficticios).</text:p>
      <text:p text:style-name="P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Droid Sans Mono" svg:font-family="'Droid Sans Mono', monospac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egoe UI" svg:font-family="'Segoe UI'" style:font-family-generic="roman"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等线" svg:font-family="等线" style:font-family-generic="system" style:font-pitch="variable"/>
    <style:font-face style:name="等线 Light" svg:font-family="'等线 Light'"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n" fo:country="US" style:letter-kerning="true" style:font-name-asian="等线" style:font-size-asian="12pt" style:language-asian="zh" style:country-asian="CN"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ptos" fo:font-size="12pt" fo:language="en" fo:country="US" style:letter-kerning="true" style:font-name-asian="等线" style:font-size-asian="12pt" style:language-asian="zh" style:country-asian="CN"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282cm" style:contextual-spacing="true" fo:text-indent="-0.635cm" style:auto-text-indent="false"/>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等线 Light" style:font-family-asian="'等线 Light'"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等线 Light" style:font-family-asian="'等线 Light'"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等线 Light" style:font-family-asian="'等线 Light'"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等线 Light" style:font-family-asian="'等线 Light'"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ítulo_20_5_20_Car" style:default-outline-level="5" style:list-style-name="" style:class="text">
      <style:paragraph-properties fo:margin-top="0.141cm" fo:margin-bottom="0.071cm" style:contextual-spacing="false" fo:keep-together="always" fo:keep-with-next="always"/>
      <style:text-properties fo:color="#0f4761" loext:opacity="100%" style:font-name-asian="等线 Light" style:font-family-asian="'等线 Light'"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ítulo_20_6_20_C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等线 Light" style:font-family-asian="'等线 Light'"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ítulo_20_7_20_Car" style:default-outline-level="7" style:list-style-name="" style:class="text">
      <style:paragraph-properties fo:margin-top="0.071cm" fo:margin-bottom="0cm" style:contextual-spacing="false" fo:keep-together="always" fo:keep-with-next="always"/>
      <style:text-properties fo:color="#595959" loext:opacity="100%" style:font-name-asian="等线 Light" style:font-family-asian="'等线 Light'"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ítulo_20_8_20_Car" style:default-outline-level="8" style:list-style-name="" style:class="text">
      <style:paragraph-properties fo:margin-top="0cm" fo:margin-bottom="0cm" style:contextual-spacing="false" fo:keep-together="always" fo:keep-with-next="always"/>
      <style:text-properties fo:color="#272727" loext:opacity="100%" fo:font-style="italic" style:font-name-asian="等线 Light" style:font-family-asian="'等线 Light'"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ítulo_20_9_20_Car" style:default-outline-level="9" style:list-style-name="" style:class="text">
      <style:paragraph-properties fo:margin-top="0cm" fo:margin-bottom="0cm" style:contextual-spacing="false" fo:keep-together="always" fo:keep-with-next="always"/>
      <style:text-properties fo:color="#272727" loext:opacity="100%" style:font-name-asian="等线 Light" style:font-family-asian="'等线 Light'"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ítulo_20_C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等线 Light" style:font-family-asian="'等线 Light'"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ítulo_20_Car" style:class="chapter">
      <style:text-properties fo:color="#595959" loext:opacity="100%" fo:font-size="14pt" fo:letter-spacing="0.026cm" style:font-name-asian="等线 Light" style:font-family-asian="'等线 Light'"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Cita_20_destacada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ibliography" style:family="paragraph" style:parent-style-name="Standard" style:next-style-name="Standard"/>
    <style:style style:name="Block_20_Text" style:display-name="Block Text" style:family="paragraph" style:parent-style-name="Standard">
      <style:paragraph-properties fo:margin-left="2.032cm" fo:margin-right="2.032cm" fo:padding="0.353cm" fo:border="0.26pt solid #156082" style:shadow="none"/>
      <style:text-properties fo:color="#156082" loext:opacity="100%" fo:font-style="italic" style:font-style-asian="italic" style:font-style-complex="italic">
        <loext:char-complex-color loext:theme-type="accent1" loext:color-type="theme"/>
      </style:text-properties>
    </style:style>
    <style:style style:name="Body_20_Text_20_2" style:display-name="Body Text 2" style:family="paragraph" style:parent-style-name="Standard" loext:linked-style-name="Texto_20_independiente_20_2_20_Car">
      <style:paragraph-properties fo:margin-top="0cm" fo:margin-bottom="0.212cm" style:contextual-spacing="false" fo:line-height="200%"/>
    </style:style>
    <style:style style:name="Body_20_Text_20_3" style:display-name="Body Text 3" style:family="paragraph" style:parent-style-name="Standard" loext:linked-style-name="Texto_20_independiente_20_3_20_Car">
      <style:paragraph-properties fo:margin-top="0cm" fo:margin-bottom="0.212cm" style:contextual-spacing="false"/>
      <style:text-properties fo:font-size="8pt" style:font-size-asian="8pt" style:font-size-complex="8pt"/>
    </style:style>
    <style:style style:name="First_20_line_20_indent" style:display-name="First line indent" style:family="paragraph" style:parent-style-name="Text_20_body" loext:linked-style-name="Texto_20_independiente_20_primera_20_sangría_20_Car" style:class="text">
      <style:paragraph-properties fo:margin-top="0cm" fo:margin-bottom="0.282cm" style:contextual-spacing="false" fo:text-indent="0.635cm" style:auto-text-indent="false"/>
    </style:style>
    <style:style style:name="Text_20_body_20_indent" style:display-name="Text body indent" style:family="paragraph" style:parent-style-name="Standard" loext:linked-style-name="Sangría_20_de_20_texto_20_normal_20_Car" style:class="text">
      <style:paragraph-properties fo:margin-left="0.635cm" fo:margin-top="0cm" fo:margin-bottom="0.212cm" style:contextual-spacing="false"/>
    </style:style>
    <style:style style:name="Body_20_Text_20_First_20_Indent_20_2" style:display-name="Body Text First Indent 2" style:family="paragraph" style:parent-style-name="Text_20_body_20_indent" loext:linked-style-name="Texto_20_independiente_20_primera_20_sangría_20_2_20_Car">
      <style:paragraph-properties fo:margin-top="0cm" fo:margin-bottom="0.282cm" style:contextual-spacing="false" fo:text-indent="0.635cm" style:auto-text-indent="false"/>
    </style:style>
    <style:style style:name="Body_20_Text_20_Indent_20_2" style:display-name="Body Text Indent 2" style:family="paragraph" style:parent-style-name="Standard" loext:linked-style-name="Sangría_20_2_20_de_20_t._20_independiente_20_Car">
      <style:paragraph-properties fo:margin-left="0.635cm" fo:margin-top="0cm" fo:margin-bottom="0.212cm" style:contextual-spacing="false" fo:line-height="200%"/>
    </style:style>
    <style:style style:name="Body_20_Text_20_Indent_20_3" style:display-name="Body Text Indent 3" style:family="paragraph" style:parent-style-name="Standard" loext:linked-style-name="Sangría_20_3_20_de_20_t._20_independiente_20_Car">
      <style:paragraph-properties fo:margin-left="0.635cm" fo:margin-top="0cm" fo:margin-bottom="0.212cm" style:contextual-spacing="false"/>
      <style:text-properties fo:font-size="8pt" style:font-size-asian="8pt" style:font-size-complex="8pt"/>
    </style:style>
    <style:style style:name="Appendix" style:family="paragraph" style:parent-style-name="Standard" loext:linked-style-name="Cierre_20_Car" style:class="chapter">
      <style:paragraph-properties fo:margin-left="7.62cm" fo:margin-top="0cm" fo:margin-bottom="0cm" style:contextual-spacing="false" fo:line-height="100%"/>
    </style:style>
    <style:style style:name="Marginalia" style:family="paragraph" style:parent-style-name="Standard" loext:linked-style-name="Texto_20_comentario_20_C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Asunto_20_del_20_comentario_20_Car">
      <style:text-properties fo:font-weight="bold" style:font-weight-asian="bold" style:font-weight-complex="bold"/>
    </style:style>
    <style:style style:name="Date" style:family="paragraph" style:parent-style-name="Standard" style:next-style-name="Standard" loext:linked-style-name="Fecha_20_Car"/>
    <style:style style:name="Document_20_Map" style:display-name="Document Map" style:family="paragraph" style:parent-style-name="Standard" loext:linked-style-name="Mapa_20_del_20_documento_20_Car">
      <style:paragraph-properties fo:margin-top="0cm" fo:margin-bottom="0cm" style:contextual-spacing="false" fo:line-height="100%"/>
      <style:text-properties style:font-name="Segoe UI" fo:font-family="'Segoe UI'" style:font-family-generic="roman" style:font-pitch="variable" fo:font-size="8pt" style:font-size-asian="8pt" style:font-name-complex="Segoe UI1" style:font-family-complex="'Segoe UI'" style:font-family-generic-complex="system" style:font-pitch-complex="variable" style:font-size-complex="8pt"/>
    </style:style>
    <style:style style:name="E-mail_20_Signature" style:display-name="E-mail Signature" style:family="paragraph" style:parent-style-name="Standard" loext:linked-style-name="Firma_20_de_20_correo_20_electrónico_20_Car">
      <style:paragraph-properties fo:margin-top="0cm" fo:margin-bottom="0cm" style:contextual-spacing="false" fo:line-height="100%"/>
    </style:style>
    <style:style style:name="Endnote" style:family="paragraph" style:parent-style-name="Standard" loext:linked-style-name="Texto_20_nota_20_al_20_final_20_Car" style:class="extra">
      <style:paragraph-properties fo:margin-top="0cm" fo:margin-bottom="0cm" style:contextual-spacing="false" fo:line-height="100%"/>
      <style:text-properties fo:font-size="10pt" style:font-size-asian="10pt" style:font-size-complex="10pt"/>
    </style:style>
    <style:style style:name="Addressee" style:family="paragraph" style:parent-style-name="Standard" style:class="extra">
      <style:paragraph-properties fo:margin-left="5.08cm" fo:margin-top="0cm" fo:margin-bottom="0cm" style:contextual-spacing="false" fo:line-height="100%"/>
      <style:text-properties style:font-name="Aptos Display" fo:font-family="'Aptos Display'" style:font-family-generic="roman" style:font-pitch="variable" style:font-name-asian="等线 Light" style:font-family-asian="'等线 Light'" style:font-family-generic-asian="system" style:font-pitch-asian="variable" style:font-name-complex="F" style:font-family-generic-complex="system" style:font-pitch-complex="variable"/>
    </style:style>
    <style:style style:name="Sender" style:family="paragraph" style:parent-style-name="Standard" style:class="extra">
      <style:paragraph-properties fo:margin-top="0cm" fo:margin-bottom="0cm" style:contextual-spacing="false" fo:line-height="100%"/>
      <style:text-properties style:font-name="Aptos Display" fo:font-family="'Aptos Display'" style:font-family-generic="roman" style:font-pitch="variable" fo:font-size="10pt" style:font-name-asian="等线 Light" style:font-family-asian="'等线 Light'" style:font-family-generic-asian="system" style:font-pitch-asian="variable" style:font-size-asian="10pt" style:font-name-complex="F" style:font-family-generic-complex="system" style:font-pitch-complex="variable" style:font-size-complex="10pt"/>
    </style:style>
    <style:style style:name="Header_20_and_20_Footer" style:display-name="Header and Footer" style:family="paragraph" style:parent-style-name="Standard" style:class="extra"/>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note" style:family="paragraph" style:parent-style-name="Standard" loext:linked-style-name="Texto_20_nota_20_pie_20_Car" style:class="extra">
      <style:paragraph-properties fo:margin-top="0cm" fo:margin-bottom="0cm" style:contextual-spacing="false" fo:line-height="100%"/>
      <style:text-properties fo:font-size="10pt" style:font-size-asian="10pt" style:font-size-complex="10pt"/>
    </style:style>
    <style:style style:name="Header" style:family="paragraph" style:parent-style-name="Standard" loext:linked-style-name="Encabezado_20_C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TML_20_Address" style:display-name="HTML Address" style:family="paragraph" style:parent-style-name="Standard" loext:linked-style-name="Dirección_20_HTML_20_Car">
      <style:paragraph-properties fo:margin-top="0cm" fo:margin-bottom="0cm" style:contextual-spacing="false" fo:line-height="100%"/>
      <style:text-properties fo:font-style="italic" style:font-style-asian="italic" style:font-style-complex="italic"/>
    </style:style>
    <style:style style:name="HTML_20_Preformatted" style:display-name="HTML Preformatted" style:family="paragraph" style:parent-style-name="Standard" loext:linked-style-name="HTML_20_con_20_formato_20_previo_20_Car">
      <style:paragraph-properties fo:margin-top="0cm" fo:margin-bottom="0cm" style:contextual-spacing="false" fo:line-height="100%"/>
      <style:text-properties style:font-name="Consolas" fo:font-family="Consolas" style:font-family-generic="roman" style:font-pitch="variable" fo:font-size="10pt" style:font-size-asian="10pt" style:font-size-complex="10pt"/>
    </style:style>
    <style:style style:name="Index_20_1" style:display-name="Index 1" style:family="paragraph" style:parent-style-name="Standard" style:next-style-name="Standard" style:auto-update="true" style:class="index">
      <style:paragraph-properties fo:margin-left="0.423cm" fo:margin-top="0cm" fo:margin-bottom="0cm" style:contextual-spacing="false" fo:line-height="100%" fo:text-indent="-0.423cm" style:auto-text-indent="false"/>
    </style:style>
    <style:style style:name="Index_20_2" style:display-name="Index 2" style:family="paragraph" style:parent-style-name="Standard" style:next-style-name="Standard" style:auto-update="true" style:class="index">
      <style:paragraph-properties fo:margin-left="0.847cm" fo:margin-top="0cm" fo:margin-bottom="0cm" style:contextual-spacing="false" fo:line-height="100%" fo:text-indent="-0.423cm" style:auto-text-indent="false"/>
    </style:style>
    <style:style style:name="Index_20_3" style:display-name="Index 3" style:family="paragraph" style:parent-style-name="Standard" style:next-style-name="Standard" style:auto-update="true" style:class="index">
      <style:paragraph-properties fo:margin-left="1.27cm" fo:margin-top="0cm" fo:margin-bottom="0cm" style:contextual-spacing="false" fo:line-height="100%" fo:text-indent="-0.423cm" style:auto-text-indent="false"/>
    </style:style>
    <style:style style:name="index_20_4" style:display-name="index 4" style:family="paragraph" style:parent-style-name="Standard" style:next-style-name="Standard" style:auto-update="true">
      <style:paragraph-properties fo:margin-left="1.693cm" fo:margin-top="0cm" fo:margin-bottom="0cm" style:contextual-spacing="false" fo:line-height="100%" fo:text-indent="-0.423cm" style:auto-text-indent="false"/>
    </style:style>
    <style:style style:name="index_20_5" style:display-name="index 5" style:family="paragraph" style:parent-style-name="Standard" style:next-style-name="Standard" style:auto-update="true">
      <style:paragraph-properties fo:margin-left="2.117cm" fo:margin-top="0cm" fo:margin-bottom="0cm" style:contextual-spacing="false" fo:line-height="100%" fo:text-indent="-0.423cm" style:auto-text-indent="false"/>
    </style:style>
    <style:style style:name="index_20_6" style:display-name="index 6" style:family="paragraph" style:parent-style-name="Standard" style:next-style-name="Standard" style:auto-update="true">
      <style:paragraph-properties fo:margin-left="2.54cm" fo:margin-top="0cm" fo:margin-bottom="0cm" style:contextual-spacing="false" fo:line-height="100%" fo:text-indent="-0.423cm" style:auto-text-indent="false"/>
    </style:style>
    <style:style style:name="index_20_7" style:display-name="index 7" style:family="paragraph" style:parent-style-name="Standard" style:next-style-name="Standard" style:auto-update="true">
      <style:paragraph-properties fo:margin-left="2.963cm" fo:margin-top="0cm" fo:margin-bottom="0cm" style:contextual-spacing="false" fo:line-height="100%" fo:text-indent="-0.423cm" style:auto-text-indent="false"/>
    </style:style>
    <style:style style:name="index_20_8" style:display-name="index 8" style:family="paragraph" style:parent-style-name="Standard" style:next-style-name="Standard" style:auto-update="true">
      <style:paragraph-properties fo:margin-left="3.387cm" fo:margin-top="0cm" fo:margin-bottom="0cm" style:contextual-spacing="false" fo:line-height="100%" fo:text-indent="-0.423cm" style:auto-text-indent="false"/>
    </style:style>
    <style:style style:name="index_20_9" style:display-name="index 9" style:family="paragraph" style:parent-style-name="Standard" style:next-style-name="Standard" style:auto-update="true">
      <style:paragraph-properties fo:margin-left="3.81cm" fo:margin-top="0cm" fo:margin-bottom="0cm" style:contextual-spacing="false" fo:line-height="100%" fo:text-indent="-0.423cm" style:auto-text-indent="false"/>
    </style:style>
    <style:style style:name="Index_20_Heading" style:display-name="Index Heading" style:family="paragraph" style:parent-style-name="Standard" style:next-style-name="Index_20_1" style:class="index">
      <style:text-properties style:font-name="Aptos Display" fo:font-family="'Aptos Display'" style:font-family-generic="roman" style:font-pitch="variable" fo:font-weight="bold" style:font-name-asian="等线 Light" style:font-family-asian="'等线 Light'" style:font-family-generic-asian="system" style:font-pitch-asian="variable" style:font-weight-asian="bold" style:font-name-complex="F" style:font-family-generic-complex="system" style:font-pitch-complex="variable" style:font-weight-complex="bold"/>
    </style:style>
    <style:style style:name="List_20_2_20__28_WW_29_" style:display-name="List 2 (WW)" style:family="paragraph" style:parent-style-name="Standard">
      <style:paragraph-properties fo:margin-left="1.27cm" fo:margin-top="0cm" fo:margin-bottom="0.282cm" style:contextual-spacing="true" fo:text-indent="-0.635cm" style:auto-text-indent="false"/>
    </style:style>
    <style:style style:name="List_20_3_20__28_WW_29_" style:display-name="List 3 (WW)" style:family="paragraph" style:parent-style-name="Standard">
      <style:paragraph-properties fo:margin-left="1.905cm" fo:margin-top="0cm" fo:margin-bottom="0.282cm" style:contextual-spacing="true" fo:text-indent="-0.635cm" style:auto-text-indent="false"/>
    </style:style>
    <style:style style:name="List_20_4_20__28_WW_29_" style:display-name="List 4 (WW)" style:family="paragraph" style:parent-style-name="Standard">
      <style:paragraph-properties fo:margin-left="2.54cm" fo:margin-top="0cm" fo:margin-bottom="0.282cm" style:contextual-spacing="true" fo:text-indent="-0.635cm" style:auto-text-indent="false"/>
    </style:style>
    <style:style style:name="List_20_5_20__28_WW_29_" style:display-name="List 5 (WW)" style:family="paragraph" style:parent-style-name="Standard">
      <style:paragraph-properties fo:margin-left="3.175cm" fo:margin-top="0cm" fo:margin-bottom="0.282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282cm" style:contextual-spacing="true"/>
    </style:style>
    <style:style style:name="List_20_2" style:display-name="List 2" style:family="paragraph" style:parent-style-name="Standard" style:list-style-name="WWNum2" style:class="list">
      <style:paragraph-properties fo:margin-top="0cm" fo:margin-bottom="0.282cm" style:contextual-spacing="true"/>
    </style:style>
    <style:style style:name="List_20_3" style:display-name="List 3" style:family="paragraph" style:parent-style-name="Standard" style:list-style-name="WWNum3" style:class="list">
      <style:paragraph-properties fo:margin-top="0cm" fo:margin-bottom="0.282cm" style:contextual-spacing="true"/>
    </style:style>
    <style:style style:name="List_20_4" style:display-name="List 4" style:family="paragraph" style:parent-style-name="Standard" style:list-style-name="WWNum4" style:class="list">
      <style:paragraph-properties fo:margin-top="0cm" fo:margin-bottom="0.282cm" style:contextual-spacing="true"/>
    </style:style>
    <style:style style:name="List_20_5" style:display-name="List 5" style:family="paragraph" style:parent-style-name="Standard" style:list-style-name="WWNum5" style:class="list">
      <style:paragraph-properties fo:margin-top="0cm" fo:margin-bottom="0.282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List_20_4_20_Cont." style:display-name="List 4 Cont." style:family="paragraph" style:parent-style-name="Standard" style:class="list">
      <style:paragraph-properties fo:margin-left="2.54cm" fo:margin-top="0cm" fo:margin-bottom="0.212cm" style:contextual-spacing="true"/>
    </style:style>
    <style:style style:name="List_20_5_20_Cont." style:display-name="List 5 Cont." style:family="paragraph" style:parent-style-name="Standard" style:class="list">
      <style:paragraph-properties fo:margin-left="3.175cm" fo:margin-top="0cm" fo:margin-bottom="0.212cm" style:contextual-spacing="true"/>
    </style:style>
    <style:style style:name="Numbering_20_1" style:display-name="Numbering 1" style:family="paragraph" style:parent-style-name="Standard" style:list-style-name="WWNum6" style:class="list">
      <style:paragraph-properties fo:margin-top="0cm" fo:margin-bottom="0.282cm" style:contextual-spacing="true"/>
    </style:style>
    <style:style style:name="Numbering_20_2" style:display-name="Numbering 2" style:family="paragraph" style:parent-style-name="Standard" style:list-style-name="WWNum7" style:class="list">
      <style:paragraph-properties fo:margin-top="0cm" fo:margin-bottom="0.282cm" style:contextual-spacing="true"/>
    </style:style>
    <style:style style:name="Numbering_20_3" style:display-name="Numbering 3" style:family="paragraph" style:parent-style-name="Standard" style:list-style-name="WWNum8" style:class="list">
      <style:paragraph-properties fo:margin-top="0cm" fo:margin-bottom="0.282cm" style:contextual-spacing="true"/>
    </style:style>
    <style:style style:name="Numbering_20_4" style:display-name="Numbering 4" style:family="paragraph" style:parent-style-name="Standard" style:list-style-name="WWNum9" style:class="list">
      <style:paragraph-properties fo:margin-top="0cm" fo:margin-bottom="0.282cm" style:contextual-spacing="true"/>
    </style:style>
    <style:style style:name="Numbering_20_5" style:display-name="Numbering 5" style:family="paragraph" style:parent-style-name="Standard" style:list-style-name="WWNum10" style:class="list">
      <style:paragraph-properties fo:margin-top="0cm" fo:margin-bottom="0.282cm" style:contextual-spacing="true"/>
    </style:style>
    <style:style style:name="macro" style:family="paragraph" loext:linked-style-name="Texto_20_macro_20_Car">
      <style:paragraph-properties fo:margin-top="0cm" fo:margin-bottom="0cm" style:contextual-spacing="false" fo:line-height="115%"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roman" style:font-pitch="variable" fo:font-size="10pt" style:font-size-asian="10pt" style:font-size-complex="10pt"/>
    </style:style>
    <style:style style:name="Message_20_Header" style:display-name="Message Header" style:family="paragraph" style:parent-style-name="Standard" loext:linked-style-name="Encabezado_20_de_20_mensaje_20_Car">
      <loext:graphic-properties draw:fill="solid" draw:fill-color="#cccccc"/>
      <style:paragraph-properties fo:margin-left="1.905cm" fo:margin-top="0cm" fo:margin-bottom="0cm" style:contextual-spacing="false" fo:line-height="100%" fo:text-indent="-1.905cm" style:auto-text-indent="false" fo:background-color="#cccccc" fo:padding="0.035cm" fo:border="0.74pt solid #000000" style:shadow="none"/>
      <style:text-properties style:font-name="Aptos Display" fo:font-family="'Aptos Display'" style:font-family-generic="roman" style:font-pitch="variable" style:font-name-asian="等线 Light" style:font-family-asian="'等线 Light'" style:font-family-generic-asian="system" style:font-pitch-asian="variable" style:font-name-complex="F" style:font-family-generic-complex="system" style:font-pitch-complex="variable"/>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Normal_20_Indent" style:display-name="Normal Indent" style:family="paragraph" style:parent-style-name="Standard">
      <style:paragraph-properties fo:margin-left="1.27cm"/>
    </style:style>
    <style:style style:name="Note_20_Heading" style:display-name="Note Heading" style:family="paragraph" style:parent-style-name="Standard" style:next-style-name="Standard" loext:linked-style-name="Encabezado_20_de_20_nota_20_Car">
      <style:paragraph-properties fo:margin-top="0cm" fo:margin-bottom="0cm" style:contextual-spacing="false" fo:line-height="100%"/>
    </style:style>
    <style:style style:name="Plain_20_Text" style:display-name="Plain Text" style:family="paragraph" style:parent-style-name="Standard" loext:linked-style-name="Texto_20_sin_20_formato_20_Car">
      <style:paragraph-properties fo:margin-top="0cm" fo:margin-bottom="0cm" style:contextual-spacing="false" fo:line-height="100%"/>
      <style:text-properties style:font-name="Consolas" fo:font-family="Consolas" style:font-family-generic="roman" style:font-pitch="variable" fo:font-size="10.5pt" style:font-size-asian="10.5pt" style:font-size-complex="10.5pt"/>
    </style:style>
    <style:style style:name="Salutation" style:family="paragraph" style:parent-style-name="Standard" style:next-style-name="Standard" loext:linked-style-name="Saludo_20_Car" style:class="text"/>
    <style:style style:name="Signature" style:family="paragraph" style:parent-style-name="Standard" loext:linked-style-name="Firma_20_Car" style:class="text">
      <style:paragraph-properties fo:margin-left="7.62cm" fo:margin-top="0cm" fo:margin-bottom="0cm" style:contextual-spacing="false" fo:line-height="100%"/>
    </style:style>
    <style:style style:name="Bibliography_20_Heading" style:display-name="Bibliography Heading" style:family="paragraph" style:parent-style-name="Standard" style:next-style-name="Standard" style:class="index">
      <style:paragraph-properties fo:margin-left="0.423cm" fo:margin-top="0cm" fo:margin-bottom="0cm" style:contextual-spacing="false" fo:text-indent="-0.423cm" style:auto-text-indent="false"/>
    </style:style>
    <style:style style:name="Figure_20_Index_20_1" style:display-name="Figure Index 1" style:family="paragraph" style:parent-style-name="Standard" style:next-style-name="Standard" style:class="index">
      <style:paragraph-properties fo:margin-top="0cm" fo:margin-bottom="0cm" style:contextual-spacing="false"/>
    </style:style>
    <style:style style:name="toa_20_heading" style:display-name="toa heading" style:family="paragraph" style:parent-style-name="Standard" style:next-style-name="Standard">
      <style:paragraph-properties fo:margin-top="0.212cm" fo:margin-bottom="0.282cm" style:contextual-spacing="false"/>
      <style:text-properties style:font-name="Aptos Display" fo:font-family="'Aptos Display'" style:font-family-generic="roman" style:font-pitch="variable" fo:font-weight="bold" style:font-name-asian="等线 Light" style:font-family-asian="'等线 Light'" style:font-family-generic-asian="system" style:font-pitch-asian="variable" style:font-weight-asian="bold" style:font-name-complex="F" style:font-family-generic-complex="system" style:font-pitch-complex="variable" style:font-weight-complex="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847cm" fo:margin-top="0cm" fo:margin-bottom="0.176cm" style:contextual-spacing="false"/>
    </style:style>
    <style:style style:name="Contents_20_4" style:display-name="Contents 4" style:family="paragraph" style:parent-style-name="Standard" style:next-style-name="Standard" style:auto-update="true" style:class="index">
      <style:paragraph-properties fo:margin-left="1.27cm" fo:margin-top="0cm" fo:margin-bottom="0.176cm" style:contextual-spacing="false"/>
    </style:style>
    <style:style style:name="Contents_20_5" style:display-name="Contents 5" style:family="paragraph" style:parent-style-name="Standard" style:next-style-name="Standard" style:auto-update="true" style:class="index">
      <style:paragraph-properties fo:margin-left="1.693cm" fo:margin-top="0cm" fo:margin-bottom="0.176cm" style:contextual-spacing="false"/>
    </style:style>
    <style:style style:name="Contents_20_6" style:display-name="Contents 6" style:family="paragraph" style:parent-style-name="Standard" style:next-style-name="Standard" style:auto-update="true" style:class="index">
      <style:paragraph-properties fo:margin-left="2.117cm" fo:margin-top="0cm" fo:margin-bottom="0.176cm" style:contextual-spacing="false"/>
    </style:style>
    <style:style style:name="Contents_20_7" style:display-name="Contents 7" style:family="paragraph" style:parent-style-name="Standard" style:next-style-name="Standard" style:auto-update="true" style:class="index">
      <style:paragraph-properties fo:margin-left="2.54cm" fo:margin-top="0cm" fo:margin-bottom="0.176cm" style:contextual-spacing="false"/>
    </style:style>
    <style:style style:name="Contents_20_8" style:display-name="Contents 8" style:family="paragraph" style:parent-style-name="Standard" style:next-style-name="Standard" style:auto-update="true" style:class="index">
      <style:paragraph-properties fo:margin-left="2.963cm" fo:margin-top="0cm" fo:margin-bottom="0.176cm" style:contextual-spacing="false"/>
    </style:style>
    <style:style style:name="Contents_20_9" style:display-name="Contents 9" style:family="paragraph" style:parent-style-name="Standard" style:next-style-name="Standard" style:auto-update="true" style:class="index">
      <style:paragraph-properties fo:margin-left="3.387cm" fo:margin-top="0cm" fo:margin-bottom="0.176cm" style:contextual-spacing="false"/>
    </style:style>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style:text-properties fo:font-size="16pt" style:font-size-asian="16pt" style:font-size-complex="16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ítulo_20_1_20_Car" style:display-name="Título 1 C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等线 Light" style:font-family-asian="'等线 Light'"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等线 Light" style:font-family-asian="'等线 Light'"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loext:linked-style-name="Heading_20_3">
      <style:text-properties fo:color="#0f4761" loext:opacity="100%" fo:font-size="14pt" style:font-name-asian="等线 Light" style:font-family-asian="'等线 Light'"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ítulo_20_4_20_Car" style:display-name="Título 4 Car" style:family="text" style:parent-style-name="Default_20_Paragraph_20_Font" loext:linked-style-name="Heading_20_4">
      <style:text-properties fo:color="#0f4761" loext:opacity="100%" fo:font-style="italic" style:font-name-asian="等线 Light" style:font-family-asian="'等线 Light'"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ítulo_20_5_20_Car" style:display-name="Título 5 Car" style:family="text" style:parent-style-name="Default_20_Paragraph_20_Font" loext:linked-style-name="Heading_20_5">
      <style:text-properties fo:color="#0f4761" loext:opacity="100%" style:font-name-asian="等线 Light" style:font-family-asian="'等线 Light'"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Título_20_6_20_Car" style:display-name="Título 6 Car" style:family="text" style:parent-style-name="Default_20_Paragraph_20_Font" loext:linked-style-name="Heading_20_6">
      <style:text-properties fo:color="#595959" loext:opacity="100%" fo:font-style="italic" style:font-name-asian="等线 Light" style:font-family-asian="'等线 Light'"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ítulo_20_7_20_Car" style:display-name="Título 7 Car" style:family="text" style:parent-style-name="Default_20_Paragraph_20_Font" loext:linked-style-name="Heading_20_7">
      <style:text-properties fo:color="#595959" loext:opacity="100%" style:font-name-asian="等线 Light" style:font-family-asian="'等线 Light'"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Título_20_8_20_Car" style:display-name="Título 8 Car" style:family="text" style:parent-style-name="Default_20_Paragraph_20_Font" loext:linked-style-name="Heading_20_8">
      <style:text-properties fo:color="#272727" loext:opacity="100%" fo:font-style="italic" style:font-name-asian="等线 Light" style:font-family-asian="'等线 Light'"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ítulo_20_9_20_Car" style:display-name="Título 9 Car" style:family="text" style:parent-style-name="Default_20_Paragraph_20_Font" loext:linked-style-name="Heading_20_9">
      <style:text-properties fo:color="#272727" loext:opacity="100%" style:font-name-asian="等线 Light" style:font-family-asian="'等线 Light'"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ítulo_20_Car" style:display-name="Título C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等线 Light" style:font-family-asian="'等线 Light'" style:font-family-generic-asian="system" style:font-pitch-asian="variable" style:font-size-asian="28pt" style:font-name-complex="F" style:font-family-generic-complex="system" style:font-pitch-complex="variable" style:font-size-complex="28pt"/>
    </style:style>
    <style:style style:name="Subtítulo_20_Car" style:display-name="Subtítulo Car" style:family="text" style:parent-style-name="Default_20_Paragraph_20_Font" loext:linked-style-name="Subtitle">
      <style:text-properties fo:color="#595959" loext:opacity="100%" fo:font-size="14pt" fo:letter-spacing="0.026cm" style:font-name-asian="等线 Light" style:font-family-asian="'等线 Light'"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_20_Car" style:display-name="Cita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_20_destacada_20_Car" style:display-name="Cita destacada C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Texto_20_de_20_globo_20_Car" style:display-name="Texto de globo C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exto_20_independiente_20_Car" style:display-name="Texto independiente Car" style:family="text" style:parent-style-name="Default_20_Paragraph_20_Font"/>
    <style:style style:name="Texto_20_independiente_20_2_20_Car" style:display-name="Texto independiente 2 Car" style:family="text" style:parent-style-name="Default_20_Paragraph_20_Font" loext:linked-style-name="Body_20_Text_20_2"/>
    <style:style style:name="Texto_20_independiente_20_3_20_Car" style:display-name="Texto independiente 3 Car" style:family="text" style:parent-style-name="Default_20_Paragraph_20_Font" loext:linked-style-name="Body_20_Text_20_3">
      <style:text-properties fo:font-size="8pt" style:font-size-asian="8pt" style:font-size-complex="8pt"/>
    </style:style>
    <style:style style:name="Texto_20_independiente_20_primera_20_sangría_20_Car" style:display-name="Texto independiente primera sangría Car" style:family="text" style:parent-style-name="Texto_20_independiente_20_Car"/>
    <style:style style:name="Sangría_20_de_20_texto_20_normal_20_Car" style:display-name="Sangría de texto normal Car" style:family="text" style:parent-style-name="Default_20_Paragraph_20_Font"/>
    <style:style style:name="Texto_20_independiente_20_primera_20_sangría_20_2_20_Car" style:display-name="Texto independiente primera sangría 2 Car" style:family="text" style:parent-style-name="Sangría_20_de_20_texto_20_normal_20_Car" loext:linked-style-name="Body_20_Text_20_First_20_Indent_20_2"/>
    <style:style style:name="Sangría_20_2_20_de_20_t._20_independiente_20_Car" style:display-name="Sangría 2 de t. independiente Car" style:family="text" style:parent-style-name="Default_20_Paragraph_20_Font" loext:linked-style-name="Body_20_Text_20_Indent_20_2"/>
    <style:style style:name="Sangría_20_3_20_de_20_t._20_independiente_20_Car" style:display-name="Sangría 3 de t. independiente Car" style:family="text" style:parent-style-name="Default_20_Paragraph_20_Font" loext:linked-style-name="Body_20_Text_20_Indent_20_3">
      <style:text-properties fo:font-size="8pt" style:font-size-asian="8pt" style:font-size-complex="8pt"/>
    </style:style>
    <style:style style:name="Cierre_20_Car" style:display-name="Cierre Car" style:family="text" style:parent-style-name="Default_20_Paragraph_20_Font" loext:linked-style-name="Appendix"/>
    <style:style style:name="Texto_20_comentario_20_Car" style:display-name="Texto comentario Car" style:family="text" style:parent-style-name="Default_20_Paragraph_20_Font" loext:linked-style-name="Marginalia">
      <style:text-properties fo:font-size="10pt" style:font-size-asian="10pt" style:font-size-complex="10pt"/>
    </style:style>
    <style:style style:name="Asunto_20_del_20_comentario_20_Car" style:display-name="Asunto del comentario Car" style:family="text" style:parent-style-name="Texto_20_comentario_20_Car" loext:linked-style-name="annotation_20_subject">
      <style:text-properties fo:font-size="10pt" fo:font-weight="bold" style:font-size-asian="10pt" style:font-weight-asian="bold" style:font-size-complex="10pt" style:font-weight-complex="bold"/>
    </style:style>
    <style:style style:name="Fecha_20_Car" style:display-name="Fecha Car" style:family="text" style:parent-style-name="Default_20_Paragraph_20_Font" loext:linked-style-name="Date"/>
    <style:style style:name="Mapa_20_del_20_documento_20_Car" style:display-name="Mapa del documento Car" style:family="text" style:parent-style-name="Default_20_Paragraph_20_Font" loext:linked-style-name="Document_20_Map">
      <style:text-properties style:font-name="Segoe UI" fo:font-family="'Segoe UI'" style:font-family-generic="roman" style:font-pitch="variable" fo:font-size="8pt" style:font-size-asian="8pt" style:font-name-complex="Segoe UI1" style:font-family-complex="'Segoe UI'" style:font-family-generic-complex="system" style:font-pitch-complex="variable" style:font-size-complex="8pt"/>
    </style:style>
    <style:style style:name="Firma_20_de_20_correo_20_electrónico_20_Car" style:display-name="Firma de correo electrónico Car" style:family="text" style:parent-style-name="Default_20_Paragraph_20_Font" loext:linked-style-name="E-mail_20_Signature"/>
    <style:style style:name="Texto_20_nota_20_al_20_final_20_Car" style:display-name="Texto nota al final Car" style:family="text" style:parent-style-name="Default_20_Paragraph_20_Font" loext:linked-style-name="Endnote">
      <style:text-properties fo:font-size="10pt" style:font-size-asian="10pt" style:font-size-complex="10pt"/>
    </style:style>
    <style:style style:name="Pie_20_de_20_página_20_Car" style:display-name="Pie de página Car" style:family="text" style:parent-style-name="Default_20_Paragraph_20_Font" loext:linked-style-name="Footer"/>
    <style:style style:name="Texto_20_nota_20_pie_20_Car" style:display-name="Texto nota pie Car" style:family="text" style:parent-style-name="Default_20_Paragraph_20_Font" loext:linked-style-name="Footnote">
      <style:text-properties fo:font-size="10pt" style:font-size-asian="10pt" style:font-size-complex="10pt"/>
    </style:style>
    <style:style style:name="Encabezado_20_Car" style:display-name="Encabezado Car" style:family="text" style:parent-style-name="Default_20_Paragraph_20_Font" loext:linked-style-name="Header"/>
    <style:style style:name="Dirección_20_HTML_20_Car" style:display-name="Dirección HTML Car" style:family="text" style:parent-style-name="Default_20_Paragraph_20_Font" loext:linked-style-name="HTML_20_Address">
      <style:text-properties fo:font-style="italic" style:font-style-asian="italic" style:font-style-complex="italic"/>
    </style:style>
    <style:style style:name="HTML_20_con_20_formato_20_previo_20_Car" style:display-name="HTML con formato previo Car" style:family="text" style:parent-style-name="Default_20_Paragraph_20_Font" loext:linked-style-name="HTML_20_Preformatted">
      <style:text-properties style:font-name="Consolas" fo:font-family="Consolas" style:font-family-generic="roman" style:font-pitch="variable" fo:font-size="10pt" style:font-size-asian="10pt" style:font-size-complex="10pt"/>
    </style:style>
    <style:style style:name="Texto_20_macro_20_Car" style:display-name="Texto macro Car" style:family="text" style:parent-style-name="Default_20_Paragraph_20_Font" loext:linked-style-name="macro">
      <style:text-properties style:font-name="Consolas" fo:font-family="Consolas" style:font-family-generic="roman" style:font-pitch="variable" fo:font-size="10pt" style:font-size-asian="10pt" style:font-size-complex="10pt"/>
    </style:style>
    <style:style style:name="Encabezado_20_de_20_mensaje_20_Car" style:display-name="Encabezado de mensaje Car" style:family="text" style:parent-style-name="Default_20_Paragraph_20_Font" loext:linked-style-name="Message_20_Header">
      <style:text-properties style:font-name="Aptos Display" fo:font-family="'Aptos Display'" style:font-family-generic="roman" style:font-pitch="variable" fo:background-color="#cccccc" style:font-name-asian="等线 Light" style:font-family-asian="'等线 Light'" style:font-family-generic-asian="system" style:font-pitch-asian="variable" style:font-name-complex="F" style:font-family-generic-complex="system" style:font-pitch-complex="variable"/>
    </style:style>
    <style:style style:name="Encabezado_20_de_20_nota_20_Car" style:display-name="Encabezado de nota Car" style:family="text" style:parent-style-name="Default_20_Paragraph_20_Font" loext:linked-style-name="Note_20_Heading"/>
    <style:style style:name="Texto_20_sin_20_formato_20_Car" style:display-name="Texto sin formato Car" style:family="text" style:parent-style-name="Default_20_Paragraph_20_Font" loext:linked-style-name="Plain_20_Text">
      <style:text-properties style:font-name="Consolas" fo:font-family="Consolas" style:font-family-generic="roman" style:font-pitch="variable" fo:font-size="10.5pt" style:font-size-asian="10.5pt" style:font-size-complex="10.5pt"/>
    </style:style>
    <style:style style:name="Saludo_20_Car" style:display-name="Saludo Car" style:family="text" style:parent-style-name="Default_20_Paragraph_20_Font"/>
    <style:style style:name="Firma_20_Car" style:display-name="Firma Car" style:family="text" style:parent-style-name="Default_20_Paragraph_20_Font" loext:linked-style-name="Signatur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0"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6</meta:editing-cycles>
    <meta:creation-date>2025-06-25T20:44:00</meta:creation-date>
    <dc:date>2026-06-17T23:20:33.815473272</dc:date>
    <meta:editing-duration>PT1H30M52S</meta:editing-duration>
    <meta:generator>LibreOffice/24.2.7.2$Linux_X86_64 LibreOffice_project/420$Build-2</meta:generator>
    <meta:document-statistic meta:table-count="4" meta:image-count="7" meta:object-count="0" meta:page-count="22" meta:paragraph-count="425" meta:word-count="2364" meta:character-count="18072" meta:non-whitespace-character-count="15914"/>
    <meta:user-defined meta:name="AppVersion">16.0000</meta:user-defined>
    <meta:template xlink:type="simple" xlink:actuate="onRequest" xlink:title="Normal.dotm" xlink:href=""/>
  </office:meta>
</office:document-meta>
</file>